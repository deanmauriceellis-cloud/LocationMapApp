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Table1" style:family="table">
      <style:table-properties style:width="5.3993in" table:align="left"/>
    </style:style>
    <style:style style:name="Table1.A" style:family="table-column">
      <style:table-column-properties style:column-width="2.3028in"/>
    </style:style>
    <style:style style:name="Table1.B" style:family="table-column">
      <style:table-column-properties style:column-width="0.3757in"/>
    </style:style>
    <style:style style:name="Table1.C" style:family="table-column">
      <style:table-column-properties style:column-width="0.7715in"/>
    </style:style>
    <style:style style:name="Table1.D" style:family="table-column">
      <style:table-column-properties style:column-width="0.5007in"/>
    </style:style>
    <style:style style:name="Table1.E" style:family="table-column">
      <style:table-column-properties style:column-width="1.4486in"/>
    </style:style>
    <style:style style:name="Table1.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ext_20_body">
      <style:text-properties fo:font-weight="bold"/>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1">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2">
      <style:paragraph-properties fo:margin-top="0in" fo:margin-bottom="0in" style:contextual-spacing="false"/>
    </style:style>
    <style:style style:name="P27" style:family="paragraph" style:parent-style-name="Text_20_body" style:list-style-name="L13"/>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4"/>
    <style:style style:name="P30" style:family="paragraph" style:parent-style-name="Text_20_body" style:list-style-name="L14">
      <style:paragraph-properties fo:margin-top="0in" fo:margin-bottom="0in" style:contextual-spacing="false"/>
    </style:style>
    <style:style style:name="P31" style:family="paragraph" style:parent-style-name="Text_20_body" style:list-style-name="L15"/>
    <style:style style:name="P32" style:family="paragraph" style:parent-style-name="Text_20_body" style:list-style-name="L15">
      <style:paragraph-properties fo:margin-top="0in" fo:margin-bottom="0in" style:contextual-spacing="false"/>
    </style:style>
    <style:style style:name="P33" style:family="paragraph" style:parent-style-name="Text_20_body" style:list-style-name="L16"/>
    <style:style style:name="P34" style:family="paragraph" style:parent-style-name="Text_20_body" style:list-style-name="L16">
      <style:paragraph-properties fo:margin-top="0in" fo:margin-bottom="0in" style:contextual-spacing="false"/>
    </style:style>
    <style:style style:name="P35" style:family="paragraph" style:parent-style-name="Text_20_body" style:list-style-name="L17"/>
    <style:style style:name="P36" style:family="paragraph" style:parent-style-name="Text_20_body" style:list-style-name="L17">
      <style:paragraph-properties fo:margin-top="0in" fo:margin-bottom="0in" style:contextual-spacing="false"/>
    </style:style>
    <style:style style:name="P37" style:family="paragraph" style:parent-style-name="Text_20_body" style:list-style-name="L18"/>
    <style:style style:name="P38" style:family="paragraph" style:parent-style-name="Text_20_body" style:list-style-name="L18">
      <style:paragraph-properties fo:margin-top="0in" fo:margin-bottom="0in" style:contextual-spacing="false"/>
    </style:style>
    <style:style style:name="P39" style:family="paragraph" style:parent-style-name="Text_20_body" style:list-style-name="L19"/>
    <style:style style:name="P40" style:family="paragraph" style:parent-style-name="Text_20_body" style:list-style-name="L19">
      <style:paragraph-properties fo:margin-top="0in" fo:margin-bottom="0in" style:contextual-spacing="false"/>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192 — Round 3 Narrations Review (23 POIs, ENRICHED)</text:p>
      <text:p text:style-name="Text_20_body">Generated 2026-04-27 with multi-source GROUND_TRUTH enrichment:</text:p>
      <text:p text:style-name="Text_20_body">1. SI dump (mode_a, mode_c, relations, sources)</text:p>
      <text:p text:style-name="Text_20_body">2. SI historical_note (sentence-filtered to pre-1860)</text:p>
      <text:p text:style-name="Text_20_body">3. <text:span text:style-name="T1">Local Salem JSON</text:span> — corwin_house, gedney_house, narbonne_house, ward_house</text:p>
      <text:p text:style-name="Text_20_body">4. Local biographies (Corwin, Hathorne, Putnams, etc.) for named figures</text:p>
      <text:p text:style-name="Text_20_body">5. Local pre-1860 dated facts referencing those figures + this site</text:p>
      <text:p text:style-name="Text_20_body"><text:span text:style-name="T1">Stats:</text:span> 17 OK, 3 reject (correctly empty), 3 skip-commemorativ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POI</text:p>
          </table:table-cell>
          <table:table-cell table:style-name="Table1.A1" office:value-type="string">
            <text:p text:style-name="Table_20_Heading">Year</text:p>
          </table:table-cell>
          <table:table-cell table:style-name="Table1.A1" office:value-type="string">
            <text:p text:style-name="Table_20_Heading">Bucket</text:p>
          </table:table-cell>
          <table:table-cell table:style-name="Table1.A1" office:value-type="string">
            <text:p text:style-name="Table_20_Heading">Words</text:p>
          </table:table-cell>
          <table:table-cell table:style-name="Table1.A1" office:value-type="string">
            <text:p text:style-name="Table_20_Heading">Status</text:p>
          </table:table-cell>
        </table:table-row>
        <table:table-row>
          <table:table-cell table:style-name="Table1.A1" office:value-type="string">
            <text:p text:style-name="Table_20_Contents">Roger Conant Statue</text:p>
          </table:table-cell>
          <table:table-cell table:style-name="Table1.A1" office:value-type="string">
            <text:p text:style-name="Table_20_Contents">null</text:p>
          </table:table-cell>
          <table:table-cell table:style-name="Table1.A1" office:value-type="string">
            <text:p text:style-name="Table_20_Contents">null</text:p>
          </table:table-cell>
          <table:table-cell table:style-name="Table1.A1" office:value-type="string">
            <text:p text:style-name="Table_20_Contents">—</text:p>
          </table:table-cell>
          <table:table-cell table:style-name="Table1.A1" office:value-type="string">
            <text:p text:style-name="Table_20_Contents">skip-commemorative</text:p>
          </table:table-cell>
        </table:table-row>
        <table:table-row>
          <table:table-cell table:style-name="Table1.A1" office:value-type="string">
            <text:p text:style-name="Table_20_Contents">The Witch House at Salem</text:p>
          </table:table-cell>
          <table:table-cell table:style-name="Table1.A1" office:value-type="string">
            <text:p text:style-name="Table_20_Contents">1650</text:p>
          </table:table-cell>
          <table:table-cell table:style-name="Table1.A1" office:value-type="string">
            <text:p text:style-name="Table_20_Contents">RICH</text:p>
          </table:table-cell>
          <table:table-cell table:style-name="Table1.A1" office:value-type="string">
            <text:p text:style-name="Table_20_Contents">334</text:p>
          </table:table-cell>
          <table:table-cell table:style-name="Table1.A1" office:value-type="string">
            <text:p text:style-name="Table_20_Contents">ok</text:p>
          </table:table-cell>
        </table:table-row>
        <table:table-row>
          <table:table-cell table:style-name="Table1.A1" office:value-type="string">
            <text:p text:style-name="Table_20_Contents">Gedney House</text:p>
          </table:table-cell>
          <table:table-cell table:style-name="Table1.A1" office:value-type="string">
            <text:p text:style-name="Table_20_Contents">1665</text:p>
          </table:table-cell>
          <table:table-cell table:style-name="Table1.A1" office:value-type="string">
            <text:p text:style-name="Table_20_Contents">RICH</text:p>
          </table:table-cell>
          <table:table-cell table:style-name="Table1.A1" office:value-type="string">
            <text:p text:style-name="Table_20_Contents">141</text:p>
          </table:table-cell>
          <table:table-cell table:style-name="Table1.A1" office:value-type="string">
            <text:p text:style-name="Table_20_Contents">ok</text:p>
          </table:table-cell>
        </table:table-row>
        <table:table-row>
          <table:table-cell table:style-name="Table1.A1" office:value-type="string">
            <text:p text:style-name="Table_20_Contents">Narbonne House</text:p>
          </table:table-cell>
          <table:table-cell table:style-name="Table1.A1" office:value-type="string">
            <text:p text:style-name="Table_20_Contents">1675</text:p>
          </table:table-cell>
          <table:table-cell table:style-name="Table1.A1" office:value-type="string">
            <text:p text:style-name="Table_20_Contents">RICH</text:p>
          </table:table-cell>
          <table:table-cell table:style-name="Table1.A1" office:value-type="string">
            <text:p text:style-name="Table_20_Contents">224</text:p>
          </table:table-cell>
          <table:table-cell table:style-name="Table1.A1" office:value-type="string">
            <text:p text:style-name="Table_20_Contents">ok</text:p>
          </table:table-cell>
        </table:table-row>
        <table:table-row>
          <table:table-cell table:style-name="Table1.A1" office:value-type="string">
            <text:p text:style-name="Table_20_Contents">John Ward House</text:p>
          </table:table-cell>
          <table:table-cell table:style-name="Table1.A1" office:value-type="string">
            <text:p text:style-name="Table_20_Contents">1684</text:p>
          </table:table-cell>
          <table:table-cell table:style-name="Table1.A1" office:value-type="string">
            <text:p text:style-name="Table_20_Contents">RICH</text:p>
          </table:table-cell>
          <table:table-cell table:style-name="Table1.A1" office:value-type="string">
            <text:p text:style-name="Table_20_Contents">146</text:p>
          </table:table-cell>
          <table:table-cell table:style-name="Table1.A1" office:value-type="string">
            <text:p text:style-name="Table_20_Contents">ok</text:p>
          </table:table-cell>
        </table:table-row>
        <table:table-row>
          <table:table-cell table:style-name="Table1.A1" office:value-type="string">
            <text:p text:style-name="Table_20_Contents">Proctor's Ledge Memorial</text:p>
          </table:table-cell>
          <table:table-cell table:style-name="Table1.A1" office:value-type="string">
            <text:p text:style-name="Table_20_Contents">null</text:p>
          </table:table-cell>
          <table:table-cell table:style-name="Table1.A1" office:value-type="string">
            <text:p text:style-name="Table_20_Contents">null</text:p>
          </table:table-cell>
          <table:table-cell table:style-name="Table1.A1" office:value-type="string">
            <text:p text:style-name="Table_20_Contents">—</text:p>
          </table:table-cell>
          <table:table-cell table:style-name="Table1.A1" office:value-type="string">
            <text:p text:style-name="Table_20_Contents">skip-commemorative</text:p>
          </table:table-cell>
        </table:table-row>
        <table:table-row>
          <table:table-cell table:style-name="Table1.A1" office:value-type="string">
            <text:p text:style-name="Table_20_Contents">Salem Witch Trials Plaque</text:p>
          </table:table-cell>
          <table:table-cell table:style-name="Table1.A1" office:value-type="string">
            <text:p text:style-name="Table_20_Contents">null</text:p>
          </table:table-cell>
          <table:table-cell table:style-name="Table1.A1" office:value-type="string">
            <text:p text:style-name="Table_20_Contents">null</text:p>
          </table:table-cell>
          <table:table-cell table:style-name="Table1.A1" office:value-type="string">
            <text:p text:style-name="Table_20_Contents">—</text:p>
          </table:table-cell>
          <table:table-cell table:style-name="Table1.A1" office:value-type="string">
            <text:p text:style-name="Table_20_Contents">skip-commemorative</text:p>
          </table:table-cell>
        </table:table-row>
        <table:table-row>
          <table:table-cell table:style-name="Table1.A1" office:value-type="string">
            <text:p text:style-name="Table_20_Contents">Crowninshield-Bentley House</text:p>
          </table:table-cell>
          <table:table-cell table:style-name="Table1.A1" office:value-type="string">
            <text:p text:style-name="Table_20_Contents">1727</text:p>
          </table:table-cell>
          <table:table-cell table:style-name="Table1.A1" office:value-type="string">
            <text:p text:style-name="Table_20_Contents">RICH</text:p>
          </table:table-cell>
          <table:table-cell table:style-name="Table1.A1" office:value-type="string">
            <text:p text:style-name="Table_20_Contents">165</text:p>
          </table:table-cell>
          <table:table-cell table:style-name="Table1.A1" office:value-type="string">
            <text:p text:style-name="Table_20_Contents">ok</text:p>
          </table:table-cell>
        </table:table-row>
        <table:table-row>
          <table:table-cell table:style-name="Table1.A1" office:value-type="string">
            <text:p text:style-name="Table_20_Contents">Ropes Mansion</text:p>
          </table:table-cell>
          <table:table-cell table:style-name="Table1.A1" office:value-type="string">
            <text:p text:style-name="Table_20_Contents">1727</text:p>
          </table:table-cell>
          <table:table-cell table:style-name="Table1.A1" office:value-type="string">
            <text:p text:style-name="Table_20_Contents">RICH</text:p>
          </table:table-cell>
          <table:table-cell table:style-name="Table1.A1" office:value-type="string">
            <text:p text:style-name="Table_20_Contents">127</text:p>
          </table:table-cell>
          <table:table-cell table:style-name="Table1.A1" office:value-type="string">
            <text:p text:style-name="Table_20_Contents">ok</text:p>
          </table:table-cell>
        </table:table-row>
        <table:table-row>
          <table:table-cell table:style-name="Table1.A1" office:value-type="string">
            <text:p text:style-name="Table_20_Contents">Derby House</text:p>
          </table:table-cell>
          <table:table-cell table:style-name="Table1.A1" office:value-type="string">
            <text:p text:style-name="Table_20_Contents">1762</text:p>
          </table:table-cell>
          <table:table-cell table:style-name="Table1.A1" office:value-type="string">
            <text:p text:style-name="Table_20_Contents">RICH</text:p>
          </table:table-cell>
          <table:table-cell table:style-name="Table1.A1" office:value-type="string">
            <text:p text:style-name="Table_20_Contents">167</text:p>
          </table:table-cell>
          <table:table-cell table:style-name="Table1.A1" office:value-type="string">
            <text:p text:style-name="Table_20_Contents">ok</text:p>
          </table:table-cell>
        </table:table-row>
        <table:table-row>
          <table:table-cell table:style-name="Table1.A1" office:value-type="string">
            <text:p text:style-name="Table_20_Contents">Fort Lee</text:p>
          </table:table-cell>
          <table:table-cell table:style-name="Table1.A1" office:value-type="string">
            <text:p text:style-name="Table_20_Contents">1776</text:p>
          </table:table-cell>
          <table:table-cell table:style-name="Table1.A1" office:value-type="string">
            <text:p text:style-name="Table_20_Contents">RICH</text:p>
          </table:table-cell>
          <table:table-cell table:style-name="Table1.A1" office:value-type="string">
            <text:p text:style-name="Table_20_Contents">—</text:p>
          </table:table-cell>
          <table:table-cell table:style-name="Table1.A1" office:value-type="string">
            <text:p text:style-name="Table_20_Contents">reject</text:p>
          </table:table-cell>
        </table:table-row>
        <table:table-row>
          <table:table-cell table:style-name="Table1.A1" office:value-type="string">
            <text:p text:style-name="Table_20_Contents">Peirce-Nichols House</text:p>
          </table:table-cell>
          <table:table-cell table:style-name="Table1.A1" office:value-type="string">
            <text:p text:style-name="Table_20_Contents">1782</text:p>
          </table:table-cell>
          <table:table-cell table:style-name="Table1.A1" office:value-type="string">
            <text:p text:style-name="Table_20_Contents">RICH</text:p>
          </table:table-cell>
          <table:table-cell table:style-name="Table1.A1" office:value-type="string">
            <text:p text:style-name="Table_20_Contents">153</text:p>
          </table:table-cell>
          <table:table-cell table:style-name="Table1.A1" office:value-type="string">
            <text:p text:style-name="Table_20_Contents">ok</text:p>
          </table:table-cell>
        </table:table-row>
        <table:table-row>
          <table:table-cell table:style-name="Table1.A1" office:value-type="string">
            <text:p text:style-name="Table_20_Contents">Joshua Ward House</text:p>
          </table:table-cell>
          <table:table-cell table:style-name="Table1.A1" office:value-type="string">
            <text:p text:style-name="Table_20_Contents">1784</text:p>
          </table:table-cell>
          <table:table-cell table:style-name="Table1.A1" office:value-type="string">
            <text:p text:style-name="Table_20_Contents">RICH</text:p>
          </table:table-cell>
          <table:table-cell table:style-name="Table1.A1" office:value-type="string">
            <text:p text:style-name="Table_20_Contents">142</text:p>
          </table:table-cell>
          <table:table-cell table:style-name="Table1.A1" office:value-type="string">
            <text:p text:style-name="Table_20_Contents">ok</text:p>
          </table:table-cell>
        </table:table-row>
        <table:table-row>
          <table:table-cell table:style-name="Table1.A1" office:value-type="string">
            <text:p text:style-name="Table_20_Contents">Central Wharf</text:p>
          </table:table-cell>
          <table:table-cell table:style-name="Table1.A1" office:value-type="string">
            <text:p text:style-name="Table_20_Contents">1790</text:p>
          </table:table-cell>
          <table:table-cell table:style-name="Table1.A1" office:value-type="string">
            <text:p text:style-name="Table_20_Contents">RICH</text:p>
          </table:table-cell>
          <table:table-cell table:style-name="Table1.A1" office:value-type="string">
            <text:p text:style-name="Table_20_Contents">116</text:p>
          </table:table-cell>
          <table:table-cell table:style-name="Table1.A1" office:value-type="string">
            <text:p text:style-name="Table_20_Contents">ok</text:p>
          </table:table-cell>
        </table:table-row>
        <table:table-row>
          <table:table-cell table:style-name="Table1.A1" office:value-type="string">
            <text:p text:style-name="Table_20_Contents">Historic Derby Wharf</text:p>
          </table:table-cell>
          <table:table-cell table:style-name="Table1.A1" office:value-type="string">
            <text:p text:style-name="Table_20_Contents">1791</text:p>
          </table:table-cell>
          <table:table-cell table:style-name="Table1.A1" office:value-type="string">
            <text:p text:style-name="Table_20_Contents">RICH</text:p>
          </table:table-cell>
          <table:table-cell table:style-name="Table1.A1" office:value-type="string">
            <text:p text:style-name="Table_20_Contents">98</text:p>
          </table:table-cell>
          <table:table-cell table:style-name="Table1.A1" office:value-type="string">
            <text:p text:style-name="Table_20_Contents">ok</text:p>
          </table:table-cell>
        </table:table-row>
        <table:table-row>
          <table:table-cell table:style-name="Table1.A1" office:value-type="string">
            <text:p text:style-name="Table_20_Contents">Gardner-Pingree House</text:p>
          </table:table-cell>
          <table:table-cell table:style-name="Table1.A1" office:value-type="string">
            <text:p text:style-name="Table_20_Contents">1800</text:p>
          </table:table-cell>
          <table:table-cell table:style-name="Table1.A1" office:value-type="string">
            <text:p text:style-name="Table_20_Contents">STANDARD</text:p>
          </table:table-cell>
          <table:table-cell table:style-name="Table1.A1" office:value-type="string">
            <text:p text:style-name="Table_20_Contents">—</text:p>
          </table:table-cell>
          <table:table-cell table:style-name="Table1.A1" office:value-type="string">
            <text:p text:style-name="Table_20_Contents">reject</text:p>
          </table:table-cell>
        </table:table-row>
        <table:table-row>
          <table:table-cell table:style-name="Table1.A1" office:value-type="string">
            <text:p text:style-name="Table_20_Contents">Nathaniel Hawthorne's Birthplace</text:p>
          </table:table-cell>
          <table:table-cell table:style-name="Table1.A1" office:value-type="string">
            <text:p text:style-name="Table_20_Contents">1804</text:p>
          </table:table-cell>
          <table:table-cell table:style-name="Table1.A1" office:value-type="string">
            <text:p text:style-name="Table_20_Contents">STANDARD</text:p>
          </table:table-cell>
          <table:table-cell table:style-name="Table1.A1" office:value-type="string">
            <text:p text:style-name="Table_20_Contents">91</text:p>
          </table:table-cell>
          <table:table-cell table:style-name="Table1.A1" office:value-type="string">
            <text:p text:style-name="Table_20_Contents">ok</text:p>
          </table:table-cell>
        </table:table-row>
        <table:table-row>
          <table:table-cell table:style-name="Table1.A1" office:value-type="string">
            <text:p text:style-name="Table_20_Contents">Hamilton Hall</text:p>
          </table:table-cell>
          <table:table-cell table:style-name="Table1.A1" office:value-type="string">
            <text:p text:style-name="Table_20_Contents">1805</text:p>
          </table:table-cell>
          <table:table-cell table:style-name="Table1.A1" office:value-type="string">
            <text:p text:style-name="Table_20_Contents">STANDARD</text:p>
          </table:table-cell>
          <table:table-cell table:style-name="Table1.A1" office:value-type="string">
            <text:p text:style-name="Table_20_Contents">91</text:p>
          </table:table-cell>
          <table:table-cell table:style-name="Table1.A1" office:value-type="string">
            <text:p text:style-name="Table_20_Contents">ok</text:p>
          </table:table-cell>
        </table:table-row>
        <table:table-row>
          <table:table-cell table:style-name="Table1.A1" office:value-type="string">
            <text:p text:style-name="Table_20_Contents">Salem Athenæum</text:p>
          </table:table-cell>
          <table:table-cell table:style-name="Table1.A1" office:value-type="string">
            <text:p text:style-name="Table_20_Contents">1810</text:p>
          </table:table-cell>
          <table:table-cell table:style-name="Table1.A1" office:value-type="string">
            <text:p text:style-name="Table_20_Contents">STANDARD</text:p>
          </table:table-cell>
          <table:table-cell table:style-name="Table1.A1" office:value-type="string">
            <text:p text:style-name="Table_20_Contents">60</text:p>
          </table:table-cell>
          <table:table-cell table:style-name="Table1.A1" office:value-type="string">
            <text:p text:style-name="Table_20_Contents">ok</text:p>
          </table:table-cell>
        </table:table-row>
        <table:table-row>
          <table:table-cell table:style-name="Table1.A1" office:value-type="string">
            <text:p text:style-name="Table_20_Contents">Custom House</text:p>
          </table:table-cell>
          <table:table-cell table:style-name="Table1.A1" office:value-type="string">
            <text:p text:style-name="Table_20_Contents">1815</text:p>
          </table:table-cell>
          <table:table-cell table:style-name="Table1.A1" office:value-type="string">
            <text:p text:style-name="Table_20_Contents">STANDARD</text:p>
          </table:table-cell>
          <table:table-cell table:style-name="Table1.A1" office:value-type="string">
            <text:p text:style-name="Table_20_Contents">106</text:p>
          </table:table-cell>
          <table:table-cell table:style-name="Table1.A1" office:value-type="string">
            <text:p text:style-name="Table_20_Contents">ok</text:p>
          </table:table-cell>
        </table:table-row>
        <table:table-row>
          <table:table-cell table:style-name="Table1.A1" office:value-type="string">
            <text:p text:style-name="Table_20_Contents">Old Town Hall</text:p>
          </table:table-cell>
          <table:table-cell table:style-name="Table1.A1" office:value-type="string">
            <text:p text:style-name="Table_20_Contents">1816</text:p>
          </table:table-cell>
          <table:table-cell table:style-name="Table1.A1" office:value-type="string">
            <text:p text:style-name="Table_20_Contents">STANDARD</text:p>
          </table:table-cell>
          <table:table-cell table:style-name="Table1.A1" office:value-type="string">
            <text:p text:style-name="Table_20_Contents">109</text:p>
          </table:table-cell>
          <table:table-cell table:style-name="Table1.A1" office:value-type="string">
            <text:p text:style-name="Table_20_Contents">ok</text:p>
          </table:table-cell>
        </table:table-row>
        <table:table-row>
          <table:table-cell table:style-name="Table1.A1" office:value-type="string">
            <text:p text:style-name="Table_20_Contents">Andrew Safford House</text:p>
          </table:table-cell>
          <table:table-cell table:style-name="Table1.A1" office:value-type="string">
            <text:p text:style-name="Table_20_Contents">1819</text:p>
          </table:table-cell>
          <table:table-cell table:style-name="Table1.A1" office:value-type="string">
            <text:p text:style-name="Table_20_Contents">STANDARD</text:p>
          </table:table-cell>
          <table:table-cell table:style-name="Table1.A1" office:value-type="string">
            <text:p text:style-name="Table_20_Contents">61</text:p>
          </table:table-cell>
          <table:table-cell table:style-name="Table1.A1" office:value-type="string">
            <text:p text:style-name="Table_20_Contents">ok</text:p>
          </table:table-cell>
        </table:table-row>
        <table:table-row>
          <table:table-cell table:style-name="Table1.A1" office:value-type="string">
            <text:p text:style-name="Table_20_Contents">14 Mall Street (Scarlet Letter House)</text:p>
          </table:table-cell>
          <table:table-cell table:style-name="Table1.A1" office:value-type="string">
            <text:p text:style-name="Table_20_Contents">1847</text:p>
          </table:table-cell>
          <table:table-cell table:style-name="Table1.A1" office:value-type="string">
            <text:p text:style-name="Table_20_Contents">STANDARD</text:p>
          </table:table-cell>
          <table:table-cell table:style-name="Table1.A1" office:value-type="string">
            <text:p text:style-name="Table_20_Contents">—</text:p>
          </table:table-cell>
          <table:table-cell table:style-name="Table1.A1" office:value-type="string">
            <text:p text:style-name="Table_20_Contents">reject</text:p>
          </table:table-cell>
        </table:table-row>
      </table:table>
      <text:p text:style-name="Horizontal_20_Line"/>
      <text:h text:style-name="Heading_20_2" text:outline-level="2">✗ Roger Conant Statue (null, null, skip-commemorative)</text:h>
      <text:p text:style-name="Text_20_body">_[no narration] name matches commemorative pattern: Roger Conant Statue_</text:p>
      <text:p text:style-name="Horizontal_20_Line"/>
      <text:h text:style-name="Heading_20_2" text:outline-level="2">✓ The Witch House at Salem (1650, RICH, 334 words)</text:h>
      <text:p text:style-name="Text_20_body">The Witch House at Salem stands within the bounds of Salem Town, a dwelling constructed circa 1675. The dwelling was long the home of Magistrate Jonathan Corwin, born in Salem in 1640, a man of wealth and standing within the colonial settlement. His father, George Corwin, was a successful merchant, and Jonathan himself further secured his position through marriage into the Winthrop family. Before the troubles of 1692, Corwin served as a magistrate in the Essex County courts, known for his competent administration. However, it is during the trials of that year that his home became most notably associated with the unfolding events. Within its walls, particularly in the Examination Parlor, preliminary examinations of the accused were conducted. A heavy table served as the magistrate’s bench, positioned before two chairs for Corwin and John Hathorne, while the accused stood before them. Documents, quills, and an inkwell rested upon the table, alongside a Bible. On March 1st, 1692, Sarah Good faced examination before Magistrates Hathorne and Corwin, with Ezekiel Cheever recording the proceedings. Tituba also underwent examination that day, with Corwin separately documenting her confession of a tall man and six years of service. Later, on March 2nd, further examination of Tituba revealed details of nine signatures in blood within a book. Throughout the spring of 1692, the house witnessed the examination of Bridget Bishop on April 19th, and George Burroughs on May 9th, alongside other magistrates. Corwin’s presence lent judicial legitimacy to these proceedings, and he accepted spectral testimony as evidence, aligning with the legal understanding of the time. Though a man of wealth, evidenced by the plastered walls, ornate carved mantelpiece, and silver within the court cupboard, he never publicly apologized for his role in the trials, continuing to hold public office until his death in 1718. The dwelling itself, with its wide pine plank floors swept with sand, hand-hewn summer beams, and fieldstone chimney, bore witness to the gravity of the times, filled with the smells of ink, beeswax, and formal cooking.</text:p>
      <text:p text:style-name="P2">Verdict:</text:p>
      <text:list text:style-name="L1">
        <text:list-item>
          <text:p text:style-name="P4"><text:span text:style-name="Teletype"><text:span text:style-name="T1">[   ]</text:span></text:span>   Approve as-is </text:p>
        </text:list-item>
        <text:list-item>
          <text:p text:style-name="P4"><text:span text:style-name="Teletype"><text:span text:style-name="T1">[   ]</text:span></text:span>   Reject — facts wrong </text:p>
        </text:list-item>
        <text:list-item>
          <text:p text:style-name="P3"><text:span text:style-name="Teletype"><text:span text:style-name="T1">[   ]</text:span></text:span>   Needs edit </text:p>
        </text:list-item>
      </text:list>
      <text:p text:style-name="Text_20_body">Notes: ____________________________________________________________</text:p>
      <text:p text:style-name="Horizontal_20_Line"/>
      <text:h text:style-name="Heading_20_2" text:outline-level="2">✓ Gedney House (1665, RICH, 141 words)</text:h>
      <text:p text:style-name="Text_20_body">Gedney House, a dwelling constructed around the year 1665. It was built by Eleazor Gedney, and he was the first to reside within its walls. Eleazor Gedney was brother to Bartholomew Gedney, a magistrate who presided over the trials concerning witchcraft that troubled the colony in 1692. The Gedney family were among the earliest settlers of this colonial settlement, arriving in 1636, and establishing themselves as part of the fabric of this new land. The house itself is a testament to the building practices of the period, a solid and respectable structure of timber frame and clapboard. It is a rare surviving example of a First Period house, and one can readily observe its permanent construction. The Gedney House stands as a direct link to those who laid the foundations of this city, a tangible reminder of their lives and beliefs.</text:p>
      <text:p text:style-name="P2">Verdict:</text:p>
      <text:list text:style-name="L2">
        <text:list-item>
          <text:p text:style-name="P6"><text:span text:style-name="Teletype"><text:span text:style-name="T1">[   ]</text:span></text:span>   Approve as-is </text:p>
        </text:list-item>
        <text:list-item>
          <text:p text:style-name="P6"><text:span text:style-name="Teletype"><text:span text:style-name="T1">[   ]</text:span></text:span>   Reject — facts wrong </text:p>
        </text:list-item>
        <text:list-item>
          <text:p text:style-name="P5"><text:span text:style-name="Teletype"><text:span text:style-name="T1">[   ]</text:span></text:span>   Needs edit </text:p>
        </text:list-item>
      </text:list>
      <text:p text:style-name="Text_20_body">Notes: ____________________________________________________________</text:p>
      <text:p text:style-name="Horizontal_20_Line"/>
      <text:h text:style-name="Heading_20_2" text:outline-level="2">✓ Narbonne House (1675, RICH, 224 words)</text:h>
      <text:p text:style-name="Text_20_body">House stands within the bounds of Salem, a dwelling constructed around the year 1675. It commenced as the home and place of business for Thomas Ives, a butcher who supplied provisions to the inhabitants of the colonial settlement. The structure’s positioning close to Essex Street was deliberate, for in those days the street fronted a bustling harbor, and the house was built to facilitate trade with the docks. This house, of modest yet solid construction, exemplifies the First Period style common to dwellings of the middling class in the Massachusetts Bay Colony. It is built with wide pine plank floors, swept clean with patterns in the sand, and hand-hewn summer beams darkened by the smoke of hearth fires. A fieldstone chimney rises from the structure, its stones cold and rough, with moss growing in the cracks. Board-and-batten doors, secured with wooden lift-latches, complete the exterior. The house is known to have borne witness to the unsettling events of 1692. It stood as a silent observer during the trials, a time of great distress and accusation within the settlement. In the year 1780, the property passed into the possession of the Andrews family. It was Sarah Narbonne, who resided within its walls for the duration of her life, who lent her name to the dwelling, becoming a familiar figure in the life of Salem Town.</text:p>
      <text:p text:style-name="P2">Verdict:</text:p>
      <text:list text:style-name="L3">
        <text:list-item>
          <text:p text:style-name="P8"><text:span text:style-name="Teletype"><text:span text:style-name="T1">[   ]</text:span></text:span>   Approve as-is </text:p>
        </text:list-item>
        <text:list-item>
          <text:p text:style-name="P8"><text:span text:style-name="Teletype"><text:span text:style-name="T1">[   ]</text:span></text:span>   Reject — facts wrong </text:p>
        </text:list-item>
        <text:list-item>
          <text:p text:style-name="P7"><text:span text:style-name="Teletype"><text:span text:style-name="T1">[   ]</text:span></text:span>   Needs edit </text:p>
        </text:list-item>
      </text:list>
      <text:p text:style-name="Text_20_body">Notes: ____________________________________________________________</text:p>
      <text:p text:style-name="Horizontal_20_Line"/>
      <text:h text:style-name="Heading_20_2" text:outline-level="2">✓ John Ward House (1684, RICH, 146 words)</text:h>
      <text:p text:style-name="Text_20_body">John Ward House stands as a testament to the earliest years of the colonial settlement. Constructed between 1684 and 1723, it is a fine example of First Period architecture, reflecting the building traditions brought from England. John Ward, a man of means engaged in trade, was the original owner of this dwelling. The house itself speaks to the life of the time. Its steeply pitched roof and minimal ornamentation are characteristic of the style, a practical approach to building in a new land. Within its walls, one can imagine the daily routines of a prosperous family, the hearth as the center of both warmth and cooking. The structure, built with wide pine plank floors and hand-hewn summer beams, reveals the skill of the colonial craftsmen. The house is located on Essex Street, a thoroughfare that has witnessed the growth of the town from its earliest days.</text:p>
      <text:p text:style-name="P2">Verdict:</text:p>
      <text:list text:style-name="L4">
        <text:list-item>
          <text:p text:style-name="P10"><text:span text:style-name="Teletype"><text:span text:style-name="T1">[   ]</text:span></text:span>   Approve as-is </text:p>
        </text:list-item>
        <text:list-item>
          <text:p text:style-name="P10"><text:span text:style-name="Teletype"><text:span text:style-name="T1">[   ]</text:span></text:span>   Reject — facts wrong </text:p>
        </text:list-item>
        <text:list-item>
          <text:p text:style-name="P9"><text:span text:style-name="Teletype"><text:span text:style-name="T1">[   ]</text:span></text:span>   Needs edit </text:p>
        </text:list-item>
      </text:list>
      <text:p text:style-name="Text_20_body">Notes: ____________________________________________________________</text:p>
      <text:p text:style-name="Horizontal_20_Line"/>
      <text:h text:style-name="Heading_20_2" text:outline-level="2">✗ Proctor's Ledge Memorial (null, null, skip-commemorative)</text:h>
      <text:p text:style-name="Text_20_body">_[no narration] name matches commemorative pattern: Proctor's Ledge Memorial_</text:p>
      <text:p text:style-name="Horizontal_20_Line"/>
      <text:h text:style-name="Heading_20_2" text:outline-level="2">✗ Salem Witch Trials Plaque (null, null, skip-commemorative)</text:h>
      <text:p text:style-name="Text_20_body">_[no narration] name matches commemorative pattern: Salem Witch Trials Plaque_</text:p>
      <text:p text:style-name="Horizontal_20_Line"/>
      <text:h text:style-name="Heading_20_2" text:outline-level="2">✓ Crowninshield-Bentley House (1727, RICH, 165 words)</text:h>
      <text:p text:style-name="Text_20_body">Crowninshield-Bentley House stands as a testament to the early years of the Province of Massachusetts Bay. Constructed circa 1727, it first served as the home of the Crowninshield family, establishing their presence in this corner of Salem. For many years, the house provided lodging for Reverend William Bentley, a man of considerable learning. From 1794 until his passing in 1819, he resided within its walls, pursuing his scholarly endeavors. Bentley was not merely a minister, but a man deeply engaged with the world around him. He devoted himself to the study of science, languages, and the careful recording of daily life. His diaries offer a detailed portrait of the era – the comings and goings of ships in the harbor, the fluctuations of the weather, and the affairs of the colony. The house itself reflects the architectural sensibilities of the time. One observes the symmetry and restrained elegance characteristic of the Georgian style, a design that speaks to Salem’s growing prominence as a maritime center.</text:p>
      <text:p text:style-name="P2">Verdict:</text:p>
      <text:list text:style-name="L5">
        <text:list-item>
          <text:p text:style-name="P12"><text:span text:style-name="Teletype"><text:span text:style-name="T1">[   ]</text:span></text:span>   Approve as-is </text:p>
        </text:list-item>
        <text:list-item>
          <text:p text:style-name="P12"><text:span text:style-name="Teletype"><text:span text:style-name="T1">[   ]</text:span></text:span>   Reject — facts wrong </text:p>
        </text:list-item>
        <text:list-item>
          <text:p text:style-name="P11"><text:span text:style-name="Teletype"><text:span text:style-name="T1">[   ]</text:span></text:span>   Needs edit </text:p>
        </text:list-item>
      </text:list>
      <text:p text:style-name="Text_20_body">Notes: ____________________________________________________________</text:p>
      <text:p text:style-name="Horizontal_20_Line"/>
      <text:h text:style-name="Heading_20_2" text:outline-level="2">✓ Ropes Mansion (1727, RICH, 127 words)</text:h>
      <text:p text:style-name="Text_20_body">Ropes Mansion stands as one of the most complete examples of Georgian architecture in the Province of Massachusetts Bay. Begun in the year 1727, it was raised not for ostentation, but for enduring strength. For nearly a century and a half, four generations of the Ropes family made their home within its walls, and they left behind a remarkable record of their daily lives. Within these rooms, one finds not mere displays, but the furnishings, silver, and textiles that were actually used by the family. The Ropes were not primarily merchants or mariners, though they were connected to the prosperity of Salem. Observe the symmetry of the facade, the careful balance of the windows – hallmarks of the Georgian style, a deliberate expression of order and well-being.</text:p>
      <text:p text:style-name="P2">Verdict:</text:p>
      <text:list text:style-name="L6">
        <text:list-item>
          <text:p text:style-name="P14"><text:span text:style-name="Teletype"><text:span text:style-name="T1">[   ]</text:span></text:span>   Approve as-is </text:p>
        </text:list-item>
        <text:list-item>
          <text:p text:style-name="P14"><text:span text:style-name="Teletype"><text:span text:style-name="T1">[   ]</text:span></text:span>   Reject — facts wrong </text:p>
        </text:list-item>
        <text:list-item>
          <text:p text:style-name="P13"><text:span text:style-name="Teletype"><text:span text:style-name="T1">[   ]</text:span></text:span>   Needs edit </text:p>
        </text:list-item>
      </text:list>
      <text:p text:style-name="Text_20_body">Notes: ____________________________________________________________</text:p>
      <text:p text:style-name="Horizontal_20_Line"/>
      <text:h text:style-name="Heading_20_2" text:outline-level="2">✓ Derby House (1762, RICH, 167 words)</text:h>
      <text:p text:style-name="Text_20_body">Derby House stands as a testament to prosperity and familial affection in the Province of Massachusetts Bay. Completed in the year 1762, it was not erected through impersonal contract, but as a gift—a wedding present commissioned by Richard Derby for his son, Elias Hasket Derby. A successful merchant himself, Richard Derby ensured the house reflected the rising fortunes of the family. Elias Hasket Derby quickly established himself as a prominent figure in Salem’s maritime world. This dwelling, therefore, became more than simply a home; it was a symbol of a thriving shipping empire, a base from which ventures reached across the seas, returning with goods from distant lands. The house itself, three stories in height, spoke to the family’s increasing wealth and standing within the colony. It is situated conveniently near Derby Wharf, allowing the owner to easily oversee his trade and commerce. The relationship between house and wharf was integral to the Derby family’s success, and the two stand as enduring reminders of Salem’s maritime past.</text:p>
      <text:p text:style-name="P2">Verdict:</text:p>
      <text:list text:style-name="L7">
        <text:list-item>
          <text:p text:style-name="P16"><text:span text:style-name="Teletype"><text:span text:style-name="T1">[   ]</text:span></text:span>   Approve as-is </text:p>
        </text:list-item>
        <text:list-item>
          <text:p text:style-name="P16"><text:span text:style-name="Teletype"><text:span text:style-name="T1">[   ]</text:span></text:span>   Reject — facts wrong </text:p>
        </text:list-item>
        <text:list-item>
          <text:p text:style-name="P15"><text:span text:style-name="Teletype"><text:span text:style-name="T1">[   ]</text:span></text:span>   Needs edit </text:p>
        </text:list-item>
      </text:list>
      <text:p text:style-name="Text_20_body">Notes: ____________________________________________________________</text:p>
      <text:p text:style-name="Horizontal_20_Line"/>
      <text:h text:style-name="Heading_20_2" text:outline-level="2">✗ Fort Lee (1776, RICH, reject)</text:h>
      <text:p text:style-name="Text_20_body">_[no narration] words=51&lt;60 (after stripping 1 violating sentences: records do not)_</text:p>
      <text:p text:style-name="Horizontal_20_Line"/>
      <text:h text:style-name="Heading_20_2" text:outline-level="2">✓ Peirce-Nichols House (1782, RICH, 153 words)</text:h>
      <text:p text:style-name="Text_20_body">The Peirce–Nichols House stands as a notable example of late 18th-century architecture in the Commonwealth of Massachusetts. Constructed circa 1782, the house was the work of Samuel McIntire, who served as both architect and builder. The original owner was the merchant John Peirce, and the house was later refined for the Nichols family. McIntire’s artistry is evident in the house’s design, which showcases a blend of classical elegance and American restraint. He was associated with patterns used in the design of the house, and also engaged in a privateering venture with Jerathmiel Peirce, a partner in the enterprise. A replica of a ship owned by Waite &amp; Peirce was also associated with the property. The house’s delicate carving above the doorway, the fanlight, and the balanced proportions all speak to the prosperity and taste of the young republic. It remains a testament to the skill of Samuel McIntire, who dreamed it into being.</text:p>
      <text:p text:style-name="P2">Verdict:</text:p>
      <text:list text:style-name="L8">
        <text:list-item>
          <text:p text:style-name="P18"><text:span text:style-name="Teletype"><text:span text:style-name="T1">[   ]</text:span></text:span>   Approve as-is </text:p>
        </text:list-item>
        <text:list-item>
          <text:p text:style-name="P18"><text:span text:style-name="Teletype"><text:span text:style-name="T1">[   ]</text:span></text:span>   Reject — facts wrong </text:p>
        </text:list-item>
        <text:list-item>
          <text:p text:style-name="P17"><text:span text:style-name="Teletype"><text:span text:style-name="T1">[   ]</text:span></text:span>   Needs edit </text:p>
        </text:list-item>
      </text:list>
      <text:p text:style-name="Text_20_body">Notes: ____________________________________________________________</text:p>
      <text:p text:style-name="Horizontal_20_Line"/>
      <text:h text:style-name="Heading_20_2" text:outline-level="2">✓ Joshua Ward House (1784, RICH, 142 words)</text:h>
      <text:p text:style-name="Text_20_body">This house, erected in 1784, stands as one of the earliest brick structures in Salem. Its construction signaled a growing prosperity in the town. More than simply a dwelling, it is distinguished by the artistry within – the interior woodwork crafted by the hand of Samuel McIntire, a noted Salem builder and woodworker. He is remembered for his skill and the delicate details he brought to the homes of the Commonwealth. In 1789, this house received a most distinguished guest. George Washington, then President of the United States, specifically requested lodging here during his visit to Salem, a moment of considerable civic pride. The house itself reflects the architectural sensibilities of the Federal period, with its restrained elegance and emphasis on proportion. The oldest surviving staircase created by McIntire can still be found within its walls, a testament to his enduring craftsmanship.</text:p>
      <text:p text:style-name="P2">Verdict:</text:p>
      <text:list text:style-name="L9">
        <text:list-item>
          <text:p text:style-name="P20"><text:span text:style-name="Teletype"><text:span text:style-name="T1">[   ]</text:span></text:span>   Approve as-is </text:p>
        </text:list-item>
        <text:list-item>
          <text:p text:style-name="P20"><text:span text:style-name="Teletype"><text:span text:style-name="T1">[   ]</text:span></text:span>   Reject — facts wrong </text:p>
        </text:list-item>
        <text:list-item>
          <text:p text:style-name="P19"><text:span text:style-name="Teletype"><text:span text:style-name="T1">[   ]</text:span></text:span>   Needs edit </text:p>
        </text:list-item>
      </text:list>
      <text:p text:style-name="Text_20_body">Notes: ____________________________________________________________</text:p>
      <text:p text:style-name="Horizontal_20_Line"/>
      <text:h text:style-name="Heading_20_2" text:outline-level="2">✓ Central Wharf (1790, RICH, 116 words)</text:h>
      <text:p text:style-name="Text_20_body">Central Wharf stands within the bounds of Derby Street and Derby Wharf. Constructed circa 1790, this wharf quickly became a vital component of the maritime commerce flourishing in Salem. The wharf, extending into Salem Harbor, provided essential facilities for the loading and unloading of goods, facilitating the exchange of commodities between the United States and distant ports. The structure itself, built of sturdy timber and stone, was a testament to the skill of the era’s craftsmen. Its robust construction ensured its ability to withstand the rigors of the sea and the weight of the cargo it supported. The wharf’s location, sheltered within the harbor, offered a safe haven for vessels seeking respite from the open ocean.</text:p>
      <text:p text:style-name="P2">Verdict:</text:p>
      <text:list text:style-name="L10">
        <text:list-item>
          <text:p text:style-name="P22"><text:soft-page-break/><text:span text:style-name="Teletype"><text:span text:style-name="T1">[   ]</text:span></text:span>   Approve as-is </text:p>
        </text:list-item>
        <text:list-item>
          <text:p text:style-name="P22"><text:span text:style-name="Teletype"><text:span text:style-name="T1">[   ]</text:span></text:span>   Reject — facts wrong </text:p>
        </text:list-item>
        <text:list-item>
          <text:p text:style-name="P21"><text:span text:style-name="Teletype"><text:span text:style-name="T1">[   ]</text:span></text:span>   Needs edit </text:p>
        </text:list-item>
      </text:list>
      <text:p text:style-name="Text_20_body">Notes: ____________________________________________________________</text:p>
      <text:p text:style-name="Horizontal_20_Line"/>
      <text:h text:style-name="Heading_20_2" text:outline-level="2">✓ Historic Derby Wharf (1791, RICH, 98 words)</text:h>
      <text:p text:style-name="Text_20_body">Historic Derby Wharf stands within the bounds of Derby Street and Derby Wharf itself. Constructed circa 1791, this wharf quickly became a vital component of the maritime commerce flourishing within the Commonwealth of Massachusetts. The wharf shares its location with the vessel <text:span text:style-name="T2">Friendship of Salem</text:span>, a testament to the enduring connection between this place and the seafaring life. The wharf’s purpose was straightforward: to facilitate the exchange of goods and connect Salem to distant ports. It stands as a physical manifestation of the economic energies that drove the town’s growth in the late eighteenth and early nineteenth centuries.</text:p>
      <text:p text:style-name="P2">Verdict:</text:p>
      <text:list text:style-name="L11">
        <text:list-item>
          <text:p text:style-name="P24"><text:span text:style-name="Teletype"><text:span text:style-name="T1">[   ]</text:span></text:span>   Approve as-is </text:p>
        </text:list-item>
        <text:list-item>
          <text:p text:style-name="P24"><text:span text:style-name="Teletype"><text:span text:style-name="T1">[   ]</text:span></text:span>   Reject — facts wrong </text:p>
        </text:list-item>
        <text:list-item>
          <text:p text:style-name="P23"><text:span text:style-name="Teletype"><text:span text:style-name="T1">[   ]</text:span></text:span>   Needs edit </text:p>
        </text:list-item>
      </text:list>
      <text:p text:style-name="Text_20_body">Notes: ____________________________________________________________</text:p>
      <text:p text:style-name="Horizontal_20_Line"/>
      <text:h text:style-name="Heading_20_2" text:outline-level="2">✗ Gardner-Pingree House (1800, STANDARD, reject)</text:h>
      <text:p text:style-name="Text_20_body">_[no narration] empty_</text:p>
      <text:p text:style-name="Horizontal_20_Line"/>
      <text:h text:style-name="Heading_20_2" text:outline-level="2">✓ Nathaniel Hawthorne's Birthplace (1804, STANDARD, 91 words)</text:h>
      <text:p text:style-name="Text_20_body">The house known as Nathaniel Hawthorne’s Birthplace stood within the Commonwealth of Massachusetts, erected circa 1804. It was constructed for Nathaniel Hawthorne Senior, a sea captain, and his wife, Elizabeth Manning. The dwelling served as the family home during the formative years of their son, the novelist Nathaniel Hawthorne. The structure is a timber-frame house, exhibiting characteristics of the Federal style common to New England architecture of the period. It remained a family residence throughout the early decades of the United States, witnessing the growth of Salem as a port town.</text:p>
      <text:p text:style-name="P2">Verdict:</text:p>
      <text:list text:style-name="L12">
        <text:list-item>
          <text:p text:style-name="P26"><text:span text:style-name="Teletype"><text:span text:style-name="T1">[   ]</text:span></text:span>   Approve as-is </text:p>
        </text:list-item>
        <text:list-item>
          <text:p text:style-name="P26"><text:span text:style-name="Teletype"><text:span text:style-name="T1">[   ]</text:span></text:span>   Reject — facts wrong </text:p>
        </text:list-item>
        <text:list-item>
          <text:p text:style-name="P25"><text:span text:style-name="Teletype"><text:span text:style-name="T1">[   ]</text:span></text:span>   Needs edit </text:p>
        </text:list-item>
      </text:list>
      <text:p text:style-name="Text_20_body">Notes: ____________________________________________________________</text:p>
      <text:p text:style-name="Horizontal_20_Line"/>
      <text:h text:style-name="Heading_20_2" text:outline-level="2">✓ Hamilton Hall (1805, STANDARD, 91 words)</text:h>
      <text:p text:style-name="Text_20_body">Hamilton Hall stands as a beautiful example of Federal style architecture, raised circa 1805. It was designed by a skilled Salem architect and builder, a man of considerable reputation in the Commonwealth. The Hall is named in honor of a prominent Founding Father and leader of the Federalist Party, a testament to the political currents of the time. This structure was conceived as a social hall, intended for gatherings and the conduct of public life. It continues in that purpose, serving as a place for assemblies and the fostering of community.</text:p>
      <text:p text:style-name="P2">Verdict:</text:p>
      <text:list text:style-name="L13">
        <text:list-item>
          <text:p text:style-name="P28"><text:span text:style-name="Teletype"><text:span text:style-name="T1">[   ]</text:span></text:span>   Approve as-is </text:p>
        </text:list-item>
        <text:list-item>
          <text:p text:style-name="P28"><text:span text:style-name="Teletype"><text:span text:style-name="T1">[   ]</text:span></text:span>   Reject — facts wrong </text:p>
        </text:list-item>
        <text:list-item>
          <text:p text:style-name="P27"><text:span text:style-name="Teletype"><text:span text:style-name="T1">[   ]</text:span></text:span>   Needs edit </text:p>
        </text:list-item>
      </text:list>
      <text:p text:style-name="Text_20_body">Notes: ____________________________________________________________</text:p>
      <text:p text:style-name="Horizontal_20_Line"/>
      <text:h text:style-name="Heading_20_2" text:outline-level="2">✓ Salem Athenæum (1810, STANDARD, 60 words)</text:h>
      <text:p text:style-name="Text_20_body">Salem Athenæum stands as a cultural establishment within the town of Salem, Massachusetts. Constructed circa 1810, it serves as a repository of knowledge, holding a collection exceeding fifty thousand volumes and fostering a variety of learned pursuits. The building is situated near other structures of the town, including those a short distance along Main Street and nearby to English Street.</text:p>
      <text:p text:style-name="P2">Verdict:</text:p>
      <text:list text:style-name="L14">
        <text:list-item>
          <text:p text:style-name="P30"><text:span text:style-name="Teletype"><text:span text:style-name="T1">[   ]</text:span></text:span>   Approve as-is </text:p>
        </text:list-item>
        <text:list-item>
          <text:p text:style-name="P30"><text:span text:style-name="Teletype"><text:span text:style-name="T1">[   ]</text:span></text:span>   Reject — facts wrong </text:p>
        </text:list-item>
        <text:list-item>
          <text:p text:style-name="P29"><text:span text:style-name="Teletype"><text:span text:style-name="T1">[   ]</text:span></text:span>   Needs edit </text:p>
        </text:list-item>
      </text:list>
      <text:p text:style-name="Text_20_body">Notes: ____________________________________________________________</text:p>
      <text:p text:style-name="Horizontal_20_Line"/>
      <text:h text:style-name="Heading_20_2" text:outline-level="2">✓ Custom House (1815, STANDARD, 106 words)</text:h>
      <text:p text:style-name="Text_20_body">Custom House in Salem, erected circa 1815, a structure dedicated to the collection of tariffs upon vessels arriving from distant shores. This building, one of many established across the nation, fell under the purview of the United States Department of the Treasury. It is known to posterity as the setting for an introductory essay penned by the author, Nathaniel Hawthorne, for his work <text:span text:style-name="T2">The Scarlet Letter</text:span>. Furthermore, the Custom House served as the subject of a sketch entitled “Main Street,” included within the Snow Image collection. A statement regarding the costs associated with these Custom-houses was submitted to and ordered printed by the United States Congress.</text:p>
      <text:p text:style-name="P2">Verdict:</text:p>
      <text:list text:style-name="L15">
        <text:list-item>
          <text:p text:style-name="P32"><text:span text:style-name="Teletype"><text:span text:style-name="T1">[   ]</text:span></text:span>   Approve as-is </text:p>
        </text:list-item>
        <text:list-item>
          <text:p text:style-name="P32"><text:span text:style-name="Teletype"><text:span text:style-name="T1">[   ]</text:span></text:span>   Reject — facts wrong </text:p>
        </text:list-item>
        <text:list-item>
          <text:p text:style-name="P31"><text:span text:style-name="Teletype"><text:span text:style-name="T1">[   ]</text:span></text:span>   Needs edit </text:p>
        </text:list-item>
      </text:list>
      <text:p text:style-name="Text_20_body">Notes: ____________________________________________________________</text:p>
      <text:p text:style-name="Horizontal_20_Line"/>
      <text:h text:style-name="Heading_20_2" text:outline-level="2">✓ Old Town Hall (1816, STANDARD, 109 words)</text:h>
      <text:p text:style-name="Text_20_body">Old Town Hall stands as a spacious and iconic structure in the heart of Salem, a testament to the town’s civic pride. Constructed in 1816, it is the earliest surviving municipal structure in Salem, and exemplifies the Federal style of architecture. Before its construction, town business was conducted in less formal settings, but this building provided a dedicated space for governance and public gatherings. The building’s design reflects the confidence of a young nation. Within its walls, citizens of the Commonwealth of Massachusetts gathered to debate and decide matters of importance to the town. The City of Salem holds this building in trust for the benefit of its citizens.</text:p>
      <text:p text:style-name="P2">Verdict:</text:p>
      <text:list text:style-name="L16">
        <text:list-item>
          <text:p text:style-name="P34"><text:span text:style-name="Teletype"><text:span text:style-name="T1">[   ]</text:span></text:span>   Approve as-is </text:p>
        </text:list-item>
        <text:list-item>
          <text:p text:style-name="P34"><text:span text:style-name="Teletype"><text:span text:style-name="T1">[   ]</text:span></text:span>   Reject — facts wrong </text:p>
        </text:list-item>
        <text:list-item>
          <text:p text:style-name="P33"><text:span text:style-name="Teletype"><text:span text:style-name="T1">[   ]</text:span></text:span>   Needs edit </text:p>
        </text:list-item>
      </text:list>
      <text:p text:style-name="Text_20_body">Notes: ____________________________________________________________</text:p>
      <text:p text:style-name="Horizontal_20_Line"/>
      <text:h text:style-name="Heading_20_2" text:outline-level="2">✓ Andrew Safford House (1819, STANDARD, 61 words)</text:h>
      <text:p text:style-name="Text_20_body">Andrew Safford House stands as a testament to the building practices of an earlier age. Constructed circa 1819, the dwelling first belonged to Andrew Safford. It is built in a style reflective of the period, exhibiting characteristics of the architecture of the time. The house shares its neighborhood with several other dwellings, each a part of the fabric of this Commonwealth.</text:p>
      <text:p text:style-name="P2">Verdict:</text:p>
      <text:list text:style-name="L17">
        <text:list-item>
          <text:p text:style-name="P36"><text:span text:style-name="Teletype"><text:span text:style-name="T1">[   ]</text:span></text:span>   Approve as-is </text:p>
        </text:list-item>
        <text:list-item>
          <text:p text:style-name="P36"><text:span text:style-name="Teletype"><text:span text:style-name="T1">[   ]</text:span></text:span>   Reject — facts wrong </text:p>
        </text:list-item>
        <text:list-item>
          <text:p text:style-name="P35"><text:span text:style-name="Teletype"><text:span text:style-name="T1">[   ]</text:span></text:span>   Needs edit </text:p>
        </text:list-item>
      </text:list>
      <text:p text:style-name="Text_20_body">Notes: ____________________________________________________________</text:p>
      <text:p text:style-name="Horizontal_20_Line"/>
      <text:h text:style-name="Heading_20_2" text:outline-level="2">✗ 14 Mall Street (Scarlet Letter House) (1847, STANDARD, reject)</text:h>
      <text:p text:style-name="Text_20_body">_[no narration] words=2&lt;60 (after stripping 0 violating sentences: )_</text:p>
      <text:p text:style-name="Horizontal_20_Line"/>
      <text:h text:style-name="Heading_20_2" text:outline-level="2">✗ Rejected / Skipped</text:h>
      <text:list text:style-name="L18">
        <text:list-item>
          <text:p text:style-name="P38">• <text:span text:style-name="T1">roger_conant_statue</text:span> — skip-commemorative (name matches commemorative pattern: Roger Conant Statue) </text:p>
        </text:list-item>
        <text:list-item>
          <text:p text:style-name="P38">• <text:span text:style-name="T1">proctors_ledge_memorial</text:span> — skip-commemorative (name matches commemorative pattern: Proctor's Ledge Memorial) </text:p>
        </text:list-item>
        <text:list-item>
          <text:p text:style-name="P38">• <text:span text:style-name="T1">salem_witch_trials_plaque</text:span> — skip-commemorative (name matches commemorative pattern: Salem Witch Trials Plaque) </text:p>
        </text:list-item>
        <text:list-item>
          <text:p text:style-name="P38">• <text:span text:style-name="T1">fort_lee</text:span> — reject (words=51&lt;60 (after stripping 1 violating sentences: records do not) </text:p>
        </text:list-item>
        <text:list-item>
          <text:p text:style-name="P38">• <text:span text:style-name="T1">gardner_pingree_house</text:span> — reject (empty) </text:p>
        </text:list-item>
        <text:list-item>
          <text:p text:style-name="P37">• <text:span text:style-name="T1">scarlet_letter_house</text:span> — reject (words=2&lt;60 (after stripping 0 violating sentences: ) </text:p>
        </text:list-item>
      </text:list>
      <text:p text:style-name="Horizontal_20_Line"/>
      <text:h text:style-name="Heading_20_2" text:outline-level="2">Final approval</text:h>
      <text:list text:style-name="L19">
        <text:list-item>
          <text:p text:style-name="P40"><text:span text:style-name="Teletype"><text:span text:style-name="T1">[   ]</text:span></text:span>   APPROVED — proceed to implement multi-pass + run on full 565 POI population </text:p>
        </text:list-item>
        <text:list-item>
          <text:p text:style-name="P40"><text:span text:style-name="Teletype"><text:span text:style-name="T1">[   ]</text:span></text:span>   APPROVED with edits — apply changes, re-test these 23, then proceed </text:p>
        </text:list-item>
        <text:list-item>
          <text:p text:style-name="P39"><text:span text:style-name="Teletype"><text:span text:style-name="T1">[   ]</text:span></text:span>   NOT APPROVED — explain below </text:p>
        </text:list-item>
      </text:list>
      <text:p text:style-name="Text_20_body">Overall notes: ____________________________________________________________</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sans-serif" fo:font-family="sans-serif" fo:font-size="11pt" style:font-name-asian="sans-serif" style:font-family-asian="sans-serif" style:font-size-asian="11pt" style:font-name-complex="sans-serif" style:font-family-complex="sans-serif" style:font-size-complex="11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text-properties fo:color="#000000" loext:opacity="100%" style:font-name="Noto Sans" fo:font-family="'Noto Sans'" style:font-pitch="variable" fo:font-size="18pt" fo:font-weight="bold" style:font-size-asian="18pt" style:font-weight-asian="bold"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padding-left="0in" fo:padding-right="0in" fo:padding-top="0in" fo:padding-bottom="0.0311in" fo:border-left="none" fo:border-right="none" fo:border-top="none" fo:border-bottom="1.5pt solid #888888"/>
      <style:text-properties fo:color="#000000" loext:opacity="100%"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pt" style:font-weight-asian="bold"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order="none" fo:padding="0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192 Round 3 Narrations Review</dc:title>
    <meta:document-statistic meta:table-count="1" meta:image-count="0" meta:object-count="0" meta:page-count="2" meta:paragraph-count="271" meta:word-count="3202" meta:character-count="20677" meta:non-whitespace-character-count="17495"/>
    <meta:generator>LibreOffice/24.2.7.2$Linux_X86_64 LibreOffice_project/420$Build-2</meta:generator>
    <meta:user-defined meta:name=""/>
  </office:meta>
</office:document-meta>
</file>