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Heading_20_1" style:master-page-name="HTML">
      <style:paragraph-properties style:page-number="auto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in" fo:margin-bottom="0in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29">
      <style:paragraph-properties fo:margin-top="0in" fo:margin-bottom="0in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0">
      <style:paragraph-properties fo:margin-top="0in" fo:margin-bottom="0in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1">
      <style:paragraph-properties fo:margin-top="0in" fo:margin-bottom="0in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2">
      <style:paragraph-properties fo:margin-top="0in" fo:margin-bottom="0in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3">
      <style:paragraph-properties fo:margin-top="0in" fo:margin-bottom="0in" style:contextual-spacing="false"/>
    </style:style>
    <style:style style:name="P69" style:family="paragraph" style:parent-style-name="Text_20_body" style:list-style-name="L34"/>
    <style:style style:name="P70" style:family="paragraph" style:parent-style-name="Text_20_body" style:list-style-name="L34">
      <style:paragraph-properties fo:margin-top="0in" fo:margin-bottom="0in" style:contextual-spacing="false"/>
    </style:style>
    <style:style style:name="P71" style:family="paragraph" style:parent-style-name="Text_20_body" style:list-style-name="L35"/>
    <style:style style:name="P72" style:family="paragraph" style:parent-style-name="Text_20_body" style:list-style-name="L35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officeooo:rsid="000ee8b4"/>
    </style:style>
    <style:style style:name="T3" style:family="text">
      <style:text-properties fo:font-style="italic"/>
    </style:style>
    <style:style style:name="T4" style:family="text">
      <style:text-properties officeooo:rsid="000ee8b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192 — Operator Validation Checklist</text:p>
      <text:p text:style-name="Body_20_Text.topinst">Each item below is a <text:span text:style-name="T1">specific decision</text:span> that needs your sign-off before</text:p>
      <text:p text:style-name="Text_20_body">we run the generator on the full POI set. For each: read the question,</text:p>
      <text:p text:style-name="Text_20_body">look at the current behavior, pick one of the options (replace [ ] with [X]),</text:p>
      <text:p text:style-name="Text_20_body">and add notes if you're picking "Other" or want a tweak.</text:p>
      <text:p text:style-name="Horizontal_20_Line"/>
      <text:h text:style-name="Heading_20_2" text:outline-level="2">SECTION A — Per-narration accuracy fact-check</text:h>
      <text:p text:style-name="P1">Goal: confirm each generated narration is factually accurate and stylistically acceptable.</text:p>
      <text:p text:style-name="Text_20_body">For each narration, read the full text in <text:span text:style-name="Teletype">session-192-narrations-review.md</text:span> (or</text:p>
      <text:p text:style-name="Text_20_body">.odt). Then mark Approve / Reject / Needs-Edit.</text:p>
      <text:p text:style-name="Horizontal_20_Line"/>
      <text:h text:style-name="Heading_20_3" text:outline-level="3">A1. The Witch House at Salem (1650, RICH, 308 words)</text:h>
      <text:p text:style-name="P1">Key claims to verify:</text:p>
      <text:list text:style-name="L1">
        <text:list-item>
          <text:p text:style-name="P4">• Built circa 1650 </text:p>
        </text:list-item>
        <text:list-item>
          <text:p text:style-name="P4">• Jonathan Corwin was a magistrate of the colony </text:p>
        </text:list-item>
        <text:list-item>
          <text:p text:style-name="P4">• Examinations of the accused were held within the house </text:p>
        </text:list-item>
        <text:list-item>
          <text:p text:style-name="P3">• Timber-framed structure </text:p>
        </text:list-item>
      </text:list>
      <text:p text:style-name="P1">Your verdict:</text:p>
      <text:list text:style-name="L2">
        <text:list-item>
          <text:p text:style-name="P6"><text:span text:style-name="Teletype"><text:span text:style-name="T1">[   </text:span></text:span><text:span text:style-name="Teletype"><text:span text:style-name="T2">x</text:span></text:span><text:span text:style-name="Teletype"><text:span text:style-name="T1">]</text:span></text:span>   Approve as-is </text:p>
        </text:list-item>
        <text:list-item>
          <text:p text:style-name="P6"><text:span text:style-name="Teletype"><text:span text:style-name="T1">[   ]</text:span></text:span>   Reject — facts are wrong (explain below) </text:p>
        </text:list-item>
        <text:list-item>
          <text:p text:style-name="P5"><text:span text:style-name="Teletype"><text:span text:style-name="T1">[   ]</text:span></text:span>   Needs edit — text is mostly right but has issues (explain below)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<text:soft-page-break/>A2. Gedney House (1665, RICH, 317 words)</text:h>
      <text:p text:style-name="P1">Key claims to verify:</text:p>
      <text:list text:style-name="L3">
        <text:list-item>
          <text:p text:style-name="P8">• Built circa 1665 by Eleazor Gedney </text:p>
        </text:list-item>
        <text:list-item>
          <text:p text:style-name="P8">• Bartholomew Gedney was Eleazor's brother and a witch-trial magistrate </text:p>
        </text:list-item>
        <text:list-item>
          <text:p text:style-name="P8">• John Gedney (forebear) was an early Salem settler </text:p>
        </text:list-item>
        <text:list-item>
          <text:p text:style-name="P7">• Some examinations held within the house </text:p>
        </text:list-item>
      </text:list>
      <text:p text:style-name="P1">Your verdict:</text:p>
      <text:list text:style-name="L4">
        <text:list-item>
          <text:p text:style-name="P10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Approve as-is </text:p>
        </text:list-item>
        <text:list-item>
          <text:p text:style-name="P10"><text:span text:style-name="Teletype"><text:span text:style-name="T1">[   ]</text:span></text:span>   Reject — facts are wrong (explain below) </text:p>
        </text:list-item>
        <text:list-item>
          <text:p text:style-name="P9"><text:span text:style-name="Teletype"><text:span text:style-name="T1">[   ]</text:span></text:span>   Needs edit — text is mostly right but has issues (explain below)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A3. Narbonne House (1675, RICH, 280 words)</text:h>
      <text:p text:style-name="P1">Key claims to verify:</text:p>
      <text:list text:style-name="L5">
        <text:list-item>
          <text:p text:style-name="P12">• First proprietor was Thomas Ives </text:p>
        </text:list-item>
        <text:list-item>
          <text:p text:style-name="P12">• Examinations held within its walls </text:p>
        </text:list-item>
        <text:list-item>
          <text:p text:style-name="P12">• Mentions Corwin and Hathorne as magistrates </text:p>
        </text:list-item>
        <text:list-item>
          <text:p text:style-name="P11">• Mentions Abigail Williams and Ann Putnam as accusers </text:p>
        </text:list-item>
      </text:list>
      <text:p text:style-name="Text_20_body">⚠ <text:span text:style-name="T1">Concern:</text:span> Were Corwin/Hathorne/Williams/Putnam actually documented at</text:p>
      <text:p text:style-name="Text_20_body">Narbonne House specifically, or did the model pull these names from</text:p>
      <text:p text:style-name="Text_20_body">generic 1692-trial KB context and attribute them to this house?</text:p>
      <text:p text:style-name="P1">Your verdict:</text:p>
      <text:list text:style-name="L6">
        <text:list-item>
          <text:p text:style-name="P14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pprove as-is — claims are accurate </text:p>
        </text:list-item>
        <text:list-item>
          <text:p text:style-name="P14"><text:span text:style-name="Teletype"><text:span text:style-name="T1">[   ]</text:span></text:span>   Reject — those names should not be attached to Narbonne House </text:p>
        </text:list-item>
        <text:list-item>
          <text:p text:style-name="P14"><text:span text:style-name="Teletype"><text:span text:style-name="T1">[   ]</text:span></text:span>   Needs edit — keep the house facts, drop the trial-name attributions </text:p>
        </text:list-item>
        <text:list-item>
          <text:p text:style-name="P13"><text:span text:style-name="Teletype"><text:span text:style-name="T1">[   ]</text:span></text:span>   I need to check the source records first </text:p>
        </text:list-item>
      </text:list>
      <text:p text:style-name="Text_20_body"><text:soft-page-break/>Notes: ____________________________________________________________</text:p>
      <text:p text:style-name="Horizontal_20_Line"/>
      <text:h text:style-name="Heading_20_3" text:outline-level="3">A4. John Ward House (1684, RICH, 206 words)</text:h>
      <text:p text:style-name="P1">Key claims to verify:</text:p>
      <text:list text:style-name="L7">
        <text:list-item>
          <text:p text:style-name="P16">• Built circa 1684 </text:p>
        </text:list-item>
        <text:list-item>
          <text:p text:style-name="P16">• First Period style </text:p>
        </text:list-item>
        <text:list-item>
          <text:p text:style-name="P15">• John Ward as owner </text:p>
        </text:list-item>
      </text:list>
      <text:p text:style-name="Text_20_body">⚠ Generic — Dow restoration sentence was stripped. Output is thin but accurate.</text:p>
      <text:p text:style-name="P1">Your verdict:</text:p>
      <text:list text:style-name="L8">
        <text:list-item>
          <text:p text:style-name="P18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Approve as-is — thin but acceptable </text:p>
        </text:list-item>
        <text:list-item>
          <text:p text:style-name="P18"><text:span text:style-name="Teletype"><text:span text:style-name="T1">[   ]</text:span></text:span>   Reject — needs to be hand-authored later, leave column NULL </text:p>
        </text:list-item>
        <text:list-item>
          <text:p text:style-name="P17"><text:span text:style-name="Teletype"><text:span text:style-name="T1">[   ]</text:span></text:span>   Needs edit (explain below)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A5. Peirce-Nichols House (1782, RICH, 251 words)</text:h>
      <text:p text:style-name="P1">Key claims to verify:</text:p>
      <text:list text:style-name="L9">
        <text:list-item>
          <text:p text:style-name="P20">• Built 1782 by Samuel McIntire (architect AND builder) </text:p>
        </text:list-item>
        <text:list-item>
          <text:p text:style-name="P20">• Original owner Jerathmiel Peirce, merchant/privateer </text:p>
        </text:list-item>
        <text:list-item>
          <text:p text:style-name="P19">• Peirce partnered with a Mr. Waite </text:p>
        </text:list-item>
      </text:list>
      <text:p text:style-name="Text_20_body">✓ Witch-trial hallucination from prior sweep is GONE.</text:p>
      <text:p text:style-name="P1">Your verdict:</text:p>
      <text:list text:style-name="L10">
        <text:list-item>
          <text:p text:style-name="P22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Approve as-is </text:p>
        </text:list-item>
        <text:list-item>
          <text:p text:style-name="P22"><text:span text:style-name="Teletype"><text:span text:style-name="T1">[   ]</text:span></text:span>   Reject — facts are wrong (explain below) </text:p>
        </text:list-item>
        <text:list-item>
          <text:p text:style-name="P21"><text:span text:style-name="Teletype"><text:span text:style-name="T1">[   ]</text:span></text:span>   Needs edit (explain below) </text:p>
        </text:list-item>
      </text:list>
      <text:p text:style-name="Text_20_body">Notes: ____________________________________________________________</text:p>
      <text:p text:style-name="Horizontal_20_Line"><text:soft-page-break/></text:p>
      <text:h text:style-name="Heading_20_3" text:outline-level="3">A6. Joshua Ward House (1784, RICH, 298 words)</text:h>
      <text:p text:style-name="P1">Key claims to verify:</text:p>
      <text:list text:style-name="L11">
        <text:list-item>
          <text:p text:style-name="P24">• Built 1784, one of Salem's earliest brick dwellings </text:p>
        </text:list-item>
        <text:list-item>
          <text:p text:style-name="P24">• Samuel McIntire did the construction and interior woodwork </text:p>
        </text:list-item>
        <text:list-item>
          <text:p text:style-name="P23">• George Washington stayed there in 1789 during his Salem visit </text:p>
        </text:list-item>
      </text:list>
      <text:p text:style-name="P1">Your verdict:</text:p>
      <text:list text:style-name="L12">
        <text:list-item>
          <text:p text:style-name="P26"><text:span text:style-name="Teletype"><text:span text:style-name="T1">[   </text:span></text:span><text:span text:style-name="Teletype"><text:span text:style-name="T2">x</text:span></text:span><text:span text:style-name="Teletype"><text:span text:style-name="T1">]</text:span></text:span>   Approve as-is </text:p>
        </text:list-item>
        <text:list-item>
          <text:p text:style-name="P26"><text:span text:style-name="Teletype"><text:span text:style-name="T1">[   ]</text:span></text:span>   Reject — facts are wrong (explain below) </text:p>
        </text:list-item>
        <text:list-item>
          <text:p text:style-name="P25"><text:span text:style-name="Teletype"><text:span text:style-name="T1">[   ]</text:span></text:span>   Needs edit (explain below)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A7. Ropes Mansion (1727, RICH, 112 words)</text:h>
      <text:p text:style-name="P1">Key claims to verify:</text:p>
      <text:list text:style-name="L13">
        <text:list-item>
          <text:p text:style-name="P28">• Built between 1727 and 1729 </text:p>
        </text:list-item>
        <text:list-item>
          <text:p text:style-name="P28">• Built for the Ropes family </text:p>
        </text:list-item>
        <text:list-item>
          <text:p text:style-name="P28">• Four generations of Ropes lived there </text:p>
        </text:list-item>
        <text:list-item>
          <text:p text:style-name="P27">• Georgian architecture </text:p>
        </text:list-item>
      </text:list>
      <text:p text:style-name="Text_20_body">⚠ Thin output — only 112 words, KB has limited pre-1860 material on this one.</text:p>
      <text:p text:style-name="P1">Your verdict:</text:p>
      <text:list text:style-name="L14">
        <text:list-item>
          <text:p text:style-name="P30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pprove as-is — thin but accurate </text:p>
        </text:list-item>
        <text:list-item>
          <text:p text:style-name="P30"><text:span text:style-name="Teletype"><text:span text:style-name="T1">[   ]</text:span></text:span>   Reject — needs to be hand-authored later, leave column NULL </text:p>
        </text:list-item>
        <text:list-item>
          <text:p text:style-name="P29"><text:span text:style-name="Teletype"><text:span text:style-name="T1">[   ]</text:span></text:span>   Needs edit (explain below) </text:p>
        </text:list-item>
      </text:list>
      <text:p text:style-name="Text_20_body">Notes: _____<text:span text:style-name="T4">It should be noted this is part of the PEB Museum</text:span>_______________________________________________________</text:p>
      <text:p text:style-name="Horizontal_20_Line"/>
      <text:h text:style-name="Heading_20_3" text:outline-level="3"><text:soft-page-break/>A8. Gardner-Pingree House (1800, STANDARD, 77 words)</text:h>
      <text:p text:style-name="P1">Key claims to verify:</text:p>
      <text:list text:style-name="L15">
        <text:list-item>
          <text:p text:style-name="P32">• Built circa 1800 </text:p>
        </text:list-item>
        <text:list-item>
          <text:p text:style-name="P31">• Domestic architecture on Essex Street </text:p>
        </text:list-item>
      </text:list>
      <text:p text:style-name="Text_20_body">⚠ Very thin — almost no specific facts. Did NOT mention McIntire (who actually</text:p>
      <text:p text:style-name="Text_20_body">designed it) or the 1830 Joseph White murder (the Gardner-Pingree's most</text:p>
      <text:p text:style-name="Text_20_body">famous historical event, and very pre-1860).</text:p>
      <text:p text:style-name="P1">Your verdict:</text:p>
      <text:list text:style-name="L16">
        <text:list-item>
          <text:p text:style-name="P34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pprove as-is — thin but accurate </text:p>
        </text:list-item>
        <text:list-item>
          <text:p text:style-name="P34"><text:span text:style-name="Teletype"><text:span text:style-name="T1">[   ]</text:span></text:span>   Reject — should be hand-authored, this needs the McIntire + White-murder content </text:p>
        </text:list-item>
        <text:list-item>
          <text:p text:style-name="P33"><text:span text:style-name="Teletype"><text:span text:style-name="T1">[   ]</text:span></text:span>   Try a re-prompt with explicit "mention McIntire and Joseph White murder if grounded"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A9. Hamilton Hall (1805, STANDARD, 68 words)</text:h>
      <text:p text:style-name="P1">Key claims to verify:</text:p>
      <text:list text:style-name="L17">
        <text:list-item>
          <text:p text:style-name="P36">• Built circa 1805 </text:p>
        </text:list-item>
        <text:list-item>
          <text:p text:style-name="P36">• Federal style, designed by a Salem architect </text:p>
        </text:list-item>
        <text:list-item>
          <text:p text:style-name="P36">• Named in honor of Alexander Hamilton (Founding Father / Federalist) </text:p>
        </text:list-item>
        <text:list-item>
          <text:p text:style-name="P35">• Used as a social hall </text:p>
        </text:list-item>
      </text:list>
      <text:p text:style-name="P1">Your verdict:</text:p>
      <text:list text:style-name="L18">
        <text:list-item>
          <text:p text:style-name="P38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pprove as-is </text:p>
        </text:list-item>
        <text:list-item>
          <text:p text:style-name="P38"><text:span text:style-name="Teletype"><text:span text:style-name="T1">[   ]</text:span></text:span>   Reject — facts are wrong (explain below) </text:p>
        </text:list-item>
        <text:list-item>
          <text:p text:style-name="P37"><text:span text:style-name="Teletype"><text:span text:style-name="T1">[   ]</text:span></text:span>   Needs edit (explain below) </text:p>
        </text:list-item>
      </text:list>
      <text:p text:style-name="Text_20_body">Notes: ____________________________________________________________</text:p>
      <text:p text:style-name="Horizontal_20_Line"><text:soft-page-break/></text:p>
      <text:h text:style-name="Heading_20_3" text:outline-level="3">A10. Custom House (1815, STANDARD, 120 words)</text:h>
      <text:p text:style-name="P1">Key claims to verify:</text:p>
      <text:list text:style-name="L19">
        <text:list-item>
          <text:p text:style-name="P40">• Built circa 1815 </text:p>
        </text:list-item>
        <text:list-item>
          <text:p text:style-name="P40">• Department of the Treasury jurisdiction </text:p>
        </text:list-item>
        <text:list-item>
          <text:p text:style-name="P40">• Setting and subject of Hawthorne's *Scarlet Letter* introductory essay </text:p>
        </text:list-item>
        <text:list-item>
          <text:p text:style-name="P39">• Hawthorne's "Main Street" sketch (Snow Image collection) referenced this building </text:p>
        </text:list-item>
      </text:list>
      <text:p text:style-name="P1">Your verdict:</text:p>
      <text:list text:style-name="L20">
        <text:list-item>
          <text:p text:style-name="P42"><text:span text:style-name="Teletype"><text:span text:style-name="T1">[   ]</text:span></text:span>   Approve as-is </text:p>
        </text:list-item>
        <text:list-item>
          <text:p text:style-name="P42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Reject — facts are wrong (explain below) </text:p>
        </text:list-item>
        <text:list-item>
          <text:p text:style-name="P41"><text:span text:style-name="Teletype"><text:span text:style-name="T1">[   ]</text:span></text:span>   Needs edit (explain below) </text:p>
        </text:list-item>
      </text:list>
      <text:p text:style-name="Text_20_body">Notes: ___<text:span text:style-name="T4">We have a POI that says something about the Scarlet Letter</text:span>_________________________________________________________</text:p>
      <text:p text:style-name="Horizontal_20_Line"/>
      <text:h text:style-name="Heading_20_2" text:outline-level="2">SECTION B — Behavior &amp; rule decisions</text:h>
      <text:p text:style-name="Horizontal_20_Line"/>
      <text:h text:style-name="Heading_20_3" text:outline-level="3">B1. Commemorative pre-filter</text:h>
      <text:p text:style-name="Text_20_body">**Question: should the generator skip POIs whose name matches the</text:p>
      <text:p text:style-name="Text_20_body">commemorative pattern, regardless of LMA year?**</text:p>
      <text:p text:style-name="Text_20_body"><text:span text:style-name="T1">Current pattern:</text:span> `statue | monument | plaque | marker | memorial |</text:p>
      <text:p text:style-name="Text_20_body">cenotaph | obelisk | tablet | bust`</text:p>
      <text:p text:style-name="Text_20_body"><text:span text:style-name="T1">Why this exists:</text:span> statues etc. are post-1860 artifacts even when</text:p>
      <text:p text:style-name="Text_20_body">honoring an earlier subject (e.g., Roger Conant Statue is 1913 even</text:p>
      <text:p text:style-name="Text_20_body">though Conant settled Salem in 1626).</text:p>
      <text:p text:style-name="P1"><text:soft-page-break/>Currently catches:</text:p>
      <text:list text:style-name="L21">
        <text:list-item>
          <text:p text:style-name="P44">• Roger Conant Statue ✓ </text:p>
        </text:list-item>
        <text:list-item>
          <text:p text:style-name="P44">• Salem Witch Trials Plaque ✓ </text:p>
        </text:list-item>
        <text:list-item>
          <text:p text:style-name="P43">• Proctor's Ledge Memorial ✓ </text:p>
        </text:list-item>
      </text:list>
      <text:p text:style-name="P1">Your decision:</text:p>
      <text:list text:style-name="L22">
        <text:list-item>
          <text:p text:style-name="P46"><text:span text:style-name="Teletype"><text:span text:style-name="T1">[  </text:span></text:span><text:span text:style-name="Teletype"><text:span text:style-name="T2">x</text:span></text:span><text:span text:style-name="Teletype"><text:span text:style-name="T1">]</text:span></text:span>   Keep as-is </text:p>
        </text:list-item>
        <text:list-item>
          <text:p text:style-name="P46"><text:span text:style-name="Teletype"><text:span text:style-name="T1">[   ]</text:span></text:span>   Add patterns: __________ (e.g., "Site of", "Statue of") </text:p>
        </text:list-item>
        <text:list-item>
          <text:p text:style-name="P46"><text:span text:style-name="Teletype"><text:span text:style-name="T1">[   ]</text:span></text:span>   Remove patterns: __________ </text:p>
        </text:list-item>
        <text:list-item>
          <text:p text:style-name="P45"><text:span text:style-name="Teletype"><text:span text:style-name="T1">[   ]</text:span></text:span>   Disable this filter (let model handle it via rule #5)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B2. Witch-trial year guard</text:h>
      <text:p text:style-name="Text_20_body">**Question: when should the generator set witch_trial=true (which</text:p>
      <text:p text:style-name="Text_20_body">triggers richer trial-focused content)?**</text:p>
      <text:p text:style-name="Text_20_body"><text:span text:style-name="T1">Current rule:</text:span> witch_trial=true if <text:span text:style-name="T1">(a)</text:span> entity year is in [1670, 1710],</text:p>
      <text:p text:style-name="Text_20_body">OR <text:span text:style-name="T1">(b)</text:span> the entity's <text:span text:style-name="Teletype">mode_a_entity.description</text:span> literally contains</text:p>
      <text:p text:style-name="Text_20_body">"witch trial" or "Salem witch trials".</text:p>
      <text:p text:style-name="Text_20_body"><text:span text:style-name="T1">Why this exists:</text:span> without the guard, the Peirce-Nichols House (1782)</text:p>
      <text:p text:style-name="Text_20_body">hallucinated a witch-trial paragraph because KB relations linked it to</text:p>
      <text:p text:style-name="Text_20_body">trial-era figures via surname matches. The guard prevented that.</text:p>
      <text:p text:style-name="P1">Your decision on the year window:</text:p>
      <text:list text:style-name="L23">
        <text:list-item>
          <text:p text:style-name="P48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Keep [1670, 1710] as-is </text:p>
        </text:list-item>
        <text:list-item>
          <text:p text:style-name="P48"><text:span text:style-name="Teletype"><text:span text:style-name="T1">[   ]</text:span></text:span>   Tighten to [1685, 1700] (only houses that existed during the actual trials) </text:p>
        </text:list-item>
        <text:list-item>
          <text:p text:style-name="P48"><text:span text:style-name="Teletype"><text:span text:style-name="T1">[   ]</text:span></text:span>   Tighten to [1675, 1700] </text:p>
        </text:list-item>
        <text:list-item>
          <text:p text:style-name="P48"><text:span text:style-name="Teletype"><text:span text:style-name="T1">[   ]</text:span></text:span>   Widen to [1660, 1715] </text:p>
        </text:list-item>
        <text:list-item>
          <text:p text:style-name="P47"><text:soft-page-break/><text:span text:style-name="Teletype"><text:span text:style-name="T1">[   ]</text:span></text:span>   Other: __________ </text:p>
        </text:list-item>
      </text:list>
      <text:p text:style-name="Text_20_body">Notes: ______________<text:span text:style-name="T4">We cover pre Witch Trials and Post events up to 1710</text:span>______________________________________________</text:p>
      <text:p text:style-name="Horizontal_20_Line"/>
      <text:h text:style-name="Heading_20_3" text:outline-level="3">B3. Sentence-level rescue (instead of full reject)</text:h>
      <text:p text:style-name="Text_20_body">**Question: when a banned-phrase violation appears in one sentence,</text:p>
      <text:p text:style-name="Text_20_body">should we keep the rest of the narration?**</text:p>
      <text:p text:style-name="Text_20_body"><text:span text:style-name="T1">Current behavior:</text:span> strip the violating sentence + any following</text:p>
      <text:p text:style-name="Text_20_body">sentences that begin with a pronoun ("He undertook…", "His work…"). If</text:p>
      <text:p text:style-name="Text_20_body">the remaining text still meets the word floor, accept it.</text:p>
      <text:p text:style-name="Text_20_body"><text:span text:style-name="T1">Example:</text:span> John Ward House had the sentence "*In the early years of the</text:p>
      <text:p text:style-name="Text_20_body">twentieth century, an antiquarian turned his attention to the house*"</text:p>
      <text:p text:style-name="Text_20_body">plus a following sentence "<text:span text:style-name="T3">His work ensured...</text:span>". Both stripped. The 4</text:p>
      <text:p text:style-name="Text_20_body">preceding pre-1860 paragraphs were kept.</text:p>
      <text:p text:style-name="P1">Your decision:</text:p>
      <text:list text:style-name="L24">
        <text:list-item>
          <text:p text:style-name="P50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Keep sentence-rescue as-is </text:p>
        </text:list-item>
        <text:list-item>
          <text:p text:style-name="P50"><text:span text:style-name="Teletype"><text:span text:style-name="T1">[   ]</text:span></text:span>   Stricter — any violation rejects the whole narration (return EMPTY) </text:p>
        </text:list-item>
        <text:list-item>
          <text:p text:style-name="P49"><text:span text:style-name="Teletype"><text:span text:style-name="T1">[   ]</text:span></text:span>   Looser — also try to clean phrases mid-sentence (e.g., delete just </text:p>
        </text:list-item>
      </text:list>
      <text:p text:style-name="Text_20_body">"twentieth-century antiquarian" without dropping the whole sentence)</text:p>
      <text:p text:style-name="Text_20_body">Notes: ____________________________________________________________</text:p>
      <text:p text:style-name="Horizontal_20_Line"/>
      <text:h text:style-name="Heading_20_3" text:outline-level="3">B4. Word-floor lock-down</text:h>
      <text:p text:style-name="Text_20_body">**Question: should the generator accept short, sparse-grounding</text:p>
      <text:p text:style-name="Text_20_body"><text:soft-page-break/>narrations (e.g., 60-150 words) or insist on rich output?**</text:p>
      <text:p text:style-name="Text_20_body"><text:span text:style-name="T1">Current behavior:</text:span> floor at <text:span text:style-name="T1">60 words for both buckets</text:span>. Prompt still</text:p>
      <text:p text:style-name="Text_20_body">asks for 250-500 words in RICH if grounded. Sparse-grounding POIs</text:p>
      <text:p text:style-name="Text_20_body">produce 60-150 words instead of EMPTY.</text:p>
      <text:p text:style-name="P1">Examples:</text:p>
      <text:list text:style-name="L25">
        <text:list-item>
          <text:p text:style-name="P52">• Ropes Mansion at 112 words — ACCEPTED (was previously REJECT) </text:p>
        </text:list-item>
        <text:list-item>
          <text:p text:style-name="P52">• Hamilton Hall at 68 words — ACCEPTED </text:p>
        </text:list-item>
        <text:list-item>
          <text:p text:style-name="P51">• Gardner-Pingree at 77 words — ACCEPTED </text:p>
        </text:list-item>
      </text:list>
      <text:p text:style-name="P1">Your decision:</text:p>
      <text:list text:style-name="L26">
        <text:list-item>
          <text:p text:style-name="P54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Keep floor at 60 / both buckets </text:p>
        </text:list-item>
        <text:list-item>
          <text:p text:style-name="P54"><text:span text:style-name="Teletype"><text:span text:style-name="T1">[   ]</text:span></text:span>   Raise RICH floor back to 100 (sparse RICH POIs go EMPTY) </text:p>
        </text:list-item>
        <text:list-item>
          <text:p text:style-name="P54"><text:span text:style-name="Teletype"><text:span text:style-name="T1">[   ]</text:span></text:span>   Raise RICH floor back to 200 (originally proposed) </text:p>
        </text:list-item>
        <text:list-item>
          <text:p text:style-name="P53"><text:span text:style-name="Teletype"><text:span text:style-name="T1">[   ]</text:span></text:span>   Lower floor further to 40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B5. Era-vocabulary rules</text:h>
      <text:p text:style-name="Text_20_body">**Question: are these temporal-framing rules correct for the</text:p>
      <text:p text:style-name="Text_20_body">narrations?**</text:p>
      <text:p text:style-name="P1">Current rules:</text:p>
      <text:list text:style-name="L27">
        <text:list-item>
          <text:p text:style-name="P56">• 1626-1691 → "Massachusetts Bay Colony" / "the colony" / "colonial settlement" </text:p>
        </text:list-item>
        <text:list-item>
          <text:p text:style-name="P56">• 1692-1775 → "Province of Massachusetts Bay" / "the colony" </text:p>
        </text:list-item>
        <text:list-item>
          <text:p text:style-name="P56">• 1776-1779 → "the colony" or "newly-declared United States" </text:p>
        </text:list-item>
        <text:list-item>
          <text:p text:style-name="P56">• 1780-1859 → "Commonwealth of Massachusetts" / "United States" </text:p>
        </text:list-item>
        <text:list-item>
          <text:p text:style-name="P56">• Pre-1776 → ban "United States" / "America" / "American" </text:p>
        </text:list-item>
        <text:list-item>
          <text:p text:style-name="P56">• Pre-1780 → ban "Commonwealth of Massachusetts" </text:p>
        </text:list-item>
        <text:list-item>
          <text:p text:style-name="P55">• 1626-1660 → may reference "Old Planters of Salem" if grounded </text:p>
        </text:list-item>
      </text:list>
      <text:p text:style-name="P1"><text:soft-page-break/>Your decision:</text:p>
      <text:list text:style-name="L28">
        <text:list-item>
          <text:p text:style-name="P58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ll rules correct as-is </text:p>
        </text:list-item>
        <text:list-item>
          <text:p text:style-name="P57"><text:span text:style-name="Teletype"><text:span text:style-name="T1">[   ]</text:span></text:span>   One or more rules are wrong (specify below)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B6. Old Planters list</text:h>
      <text:p text:style-name="P1">Question: is this list of Old Planters correct and complete?</text:p>
      <text:p text:style-name="P1">Current list (Conant's 1626 founding group):</text:p>
      <text:p text:style-name="Text_20_body">Roger Conant, John Balch, Peter Palfrey, Thomas Gardner, William Trask,</text:p>
      <text:p text:style-name="Text_20_body">John Woodbury, John Tilly, Walter Knight, William Allen, Anthony Dike</text:p>
      <text:p text:style-name="P1">Your decision:</text:p>
      <text:list text:style-name="L29">
        <text:list-item>
          <text:p text:style-name="P60"><text:span text:style-name="Teletype"><text:span text:style-name="T1">[   ]</text:span></text:span>   List is correct and complete </text:p>
        </text:list-item>
        <text:list-item>
          <text:p text:style-name="P60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dd names: __<text:span text:style-name="T4">William Woodbury</text:span>________ </text:p>
        </text:list-item>
        <text:list-item>
          <text:p text:style-name="P60"><text:span text:style-name="Teletype"><text:span text:style-name="T1">[   ]</text:span></text:span>   Remove names: __________ </text:p>
        </text:list-item>
        <text:list-item>
          <text:p text:style-name="P59"><text:span text:style-name="Teletype"><text:span text:style-name="T1">[   ]</text:span></text:span>   Drop the Old Planters mention entirely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B7. Voice / persona</text:h>
      <text:p text:style-name="Text_20_body">**Question: the prompt tells the LLM to write "*as if delivered by a</text:p>
      <text:p text:style-name="Text_20_body">careful 1859 historian*". Is this the right voice?**</text:p>
      <text:p text:style-name="Text_20_body"><text:span text:style-name="T1">Effect:</text:span> this is why the narrations sound formal / archaic ("the year</text:p>
      <text:p text:style-name="Text_20_body">of our Lord 1692", "stood as a silent observer", "in these troubled</text:p>
      <text:p text:style-name="Text_20_body">times"). It locks the model into pre-1860 vocabulary naturally.</text:p>
      <text:p text:style-name="P1"><text:soft-page-break/>Your decision:</text:p>
      <text:list text:style-name="L30">
        <text:list-item>
          <text:p text:style-name="P62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Keep "1859 historian" voice </text:p>
        </text:list-item>
        <text:list-item>
          <text:p text:style-name="P61"><text:span text:style-name="Teletype"><text:span text:style-name="T1">[   ]</text:span></text:span>   Switch to "modern historian writing only about pre-1860 facts" </text:p>
        </text:list-item>
      </text:list>
      <text:p text:style-name="Text_20_body">(more readable, but risks contemporary phrasing leaks)</text:p>
      <text:list text:style-name="L31">
        <text:list-item>
          <text:p text:style-name="P64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Switch to "neutral past-tense narrator" (drops the period flavor) </text:p>
        </text:list-item>
        <text:list-item>
          <text:p text:style-name="P63"><text:span text:style-name="Teletype"><text:span text:style-name="T1">[   ]</text:span></text:span>   Other: __________ </text:p>
        </text:list-item>
      </text:list>
      <text:p text:style-name="Text_20_body">Notes: __________________________<text:span text:style-name="T4">Narration is what drives it</text:span>__________________________________</text:p>
      <text:p text:style-name="Horizontal_20_Line"/>
      <text:h text:style-name="Heading_20_2" text:outline-level="2">SECTION C — Coverage &amp; next steps</text:h>
      <text:p text:style-name="Horizontal_20_Line"/>
      <text:h text:style-name="Heading_20_3" text:outline-level="3">C1. intel_entity_id backfill</text:h>
      <text:p text:style-name="Text_20_body"><text:span text:style-name="T1">Status now:</text:span> 53 of 597 HISTORICAL_BUILDINGS have <text:span text:style-name="Teletype">intel_entity_id</text:span></text:p>
      <text:p text:style-name="Text_20_body">populated. The other 544 are skipped by the generator (no SI link → no</text:p>
      <text:p text:style-name="Text_20_body">grounding source).</text:p>
      <text:p text:style-name="Text_20_body"><text:span text:style-name="T1">Plan:</text:span> match LMA POIs to SI entities via SI's <text:span text:style-name="Teletype">geocode-sync</text:span> endpoint</text:p>
      <text:p text:style-name="Text_20_body">(6,570 historic_building entries). Match criteria: coordinate distance</text:p>
      <text:p text:style-name="Text_20_body">&lt; 30m AND fuzzy name match (token overlap or Levenshtein).</text:p>
      <text:p text:style-name="P1">Your decision:</text:p>
      <text:list text:style-name="L32">
        <text:list-item>
          <text:p text:style-name="P66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Proceed with backfill as described </text:p>
        </text:list-item>
        <text:list-item>
          <text:p text:style-name="P66"><text:span text:style-name="Teletype"><text:span text:style-name="T1">[   ]</text:span></text:span>   Tighten match criteria (e.g., 15m + stricter name match) </text:p>
        </text:list-item>
        <text:list-item>
          <text:p text:style-name="P66"><text:span text:style-name="Teletype"><text:span text:style-name="T1">[   ]</text:span></text:span>   Loosen match criteria (e.g., 50m) </text:p>
        </text:list-item>
        <text:list-item>
          <text:p text:style-name="P66"><text:span text:style-name="Teletype"><text:span text:style-name="T1">[   ]</text:span></text:span>   Skip backfill — only run on the 53 already linked </text:p>
        </text:list-item>
        <text:list-item>
          <text:p text:style-name="P65"><text:span text:style-name="Teletype"><text:span text:style-name="T1">[   ]</text:span></text:span>   I want to spot-check the bridge logic on 5 samples first </text:p>
        </text:list-item>
      </text:list>
      <text:p text:style-name="Text_20_body">Notes: ____________________________________________________________</text:p>
      <text:p text:style-name="Horizontal_20_Line"><text:soft-page-break/></text:p>
      <text:h text:style-name="Heading_20_3" text:outline-level="3">C2. Full-run kickoff</text:h>
      <text:p text:style-name="Text_20_body">**Question: after backfill (~400-500 eligible POIs), kick off the full</text:p>
      <text:p text:style-name="Text_20_body">generator run as a background agent?**</text:p>
      <text:p text:style-name="Text_20_body"><text:span text:style-name="T1">Estimated runtime:</text:span> ~30-60 sec per POI × 500 = ~5-8 hours. Background</text:p>
      <text:p text:style-name="Text_20_body">agent is appropriate.</text:p>
      <text:p text:style-name="P1">Your decision:</text:p>
      <text:list text:style-name="L33">
        <text:list-item>
          <text:p text:style-name="P68"><text:span text:style-name="Teletype"><text:span text:style-name="T1">[   ]</text:span></text:span>   Yes, kick off background agent after backfill </text:p>
        </text:list-item>
        <text:list-item>
          <text:p text:style-name="P68"><text:span text:style-name="Teletype"><text:span text:style-name="T1">[   ]</text:span></text:span>   Run in foreground in batches of 50 so I can spot-check </text:p>
        </text:list-item>
        <text:list-item>
          <text:p text:style-name="P67"><text:span text:style-name="Teletype"><text:span text:style-name="T1">[ </text:span></text:span><text:span text:style-name="Teletype"><text:span text:style-name="T2">x</text:span></text:span><text:span text:style-name="Teletype"><text:span text:style-name="T1">  ]</text:span></text:span>   Hold — I want to review more samples first before committing </text:p>
        </text:list-item>
      </text:list>
      <text:p text:style-name="Text_20_body">Notes: ____________________________________________________________</text:p>
      <text:p text:style-name="Horizontal_20_Line"/>
      <text:h text:style-name="Heading_20_3" text:outline-level="3">C3. Post-run pipeline order</text:h>
      <text:p text:style-name="P1">Plan:</text:p>
      <text:p text:style-name="Text_20_body"><text:span text:style-name="T1">1.</text:span> Room v11 → v12 schema bump (add <text:span text:style-name="Teletype">historicalNarration</text:span> column)</text:p>
      <text:p text:style-name="Text_20_body"><text:span text:style-name="T1">2.</text:span> Update <text:span text:style-name="Teletype">publish-salem-pois.js</text:span> to include the column</text:p>
      <text:p text:style-name="Text_20_body"><text:span text:style-name="T1">3.</text:span> Admin UI Historical Narration field in PoiEditDialog</text:p>
      <text:p text:style-name="Text_20_body"><text:span text:style-name="T1">4.</text:span> Lint check <text:span text:style-name="Teletype">hist_pre1860_no_historical_narration</text:span> (coverage gaps)</text:p>
      <text:p text:style-name="Text_20_body"><text:span text:style-name="T1">5.</text:span> APK rebuild + Lenovo install + verify</text:p>
      <text:p text:style-name="P1">Your decision:</text:p>
      <text:list text:style-name="L34">
        <text:list-item>
          <text:p text:style-name="P70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Order is correct </text:p>
        </text:list-item>
        <text:list-item>
          <text:p text:style-name="P70"><text:span text:style-name="Teletype"><text:span text:style-name="T1">[   ]</text:span></text:span>   Re-order to: __________ </text:p>
        </text:list-item>
        <text:list-item>
          <text:p text:style-name="P70"><text:span text:style-name="Teletype"><text:span text:style-name="T1">[   ]</text:span></text:span>   Skip step __________ </text:p>
        </text:list-item>
        <text:list-item>
          <text:p text:style-name="P69"><text:span text:style-name="Teletype"><text:span text:style-name="T1">[   ]</text:span></text:span>   Add step: __________ </text:p>
        </text:list-item>
      </text:list>
      <text:p text:style-name="Text_20_body"><text:soft-page-break/>Notes: ____________________________________________________________</text:p>
      <text:p text:style-name="Horizontal_20_Line"/>
      <text:h text:style-name="Heading_20_2" text:outline-level="2">SECTION D — Final approval gate</text:h>
      <text:p text:style-name="P1">Question: are we approved to proceed?</text:p>
      <text:list text:style-name="L35">
        <text:list-item>
          <text:p text:style-name="P72"><text:span text:style-name="Teletype"><text:span text:style-name="T1">[  </text:span></text:span><text:span text:style-name="Teletype"><text:span text:style-name="T2">x</text:span></text:span><text:span text:style-name="Teletype"><text:span text:style-name="T1"> ]</text:span></text:span>   APPROVED — proceed with backfill + full run + post-run pipeline </text:p>
        </text:list-item>
        <text:list-item>
          <text:p text:style-name="P72"><text:span text:style-name="Teletype"><text:span text:style-name="T1">[   ]</text:span></text:span>   APPROVED with the changes noted above (apply changes, then re-test on the same 13 POIs, then proceed) </text:p>
        </text:list-item>
        <text:list-item>
          <text:p text:style-name="P71"><text:span text:style-name="Teletype"><text:span text:style-name="T1">[   ]</text:span></text:span>   NOT APPROVED — significant rework needed (explain below) </text:p>
        </text:list-item>
      </text:list>
      <text:p text:style-name="Text_20_body">Notes / overall thoughts: ____________________________________________________________</text:p>
      <text:p text:style-name="Text_20_body">________________________________________________________________________</text:p>
      <text:p text:style-name="Text_20_body">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sans-serif" fo:font-family="sans-serif" fo:font-size="11pt" style:font-name-asian="sans-serif" style:font-family-asian="sans-serif" style:font-size-asian="11pt" style:font-name-complex="sans-serif" style:font-family-complex="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fo:color="#000000" loext:opacity="100%" style:font-name="Noto Sans" fo:font-family="'Noto Sans'" style:font-pitch="variable"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 fo:padding="0in" fo:border="none"/>
      <style:text-properties fo:color="#000000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Noto Sans Devanagari1" style:font-family-complex="'Noto Sans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 fo:padding-left="0in" fo:padding-right="0in" fo:padding-top="0in" fo:padding-bottom="0.0311in" fo:border-left="none" fo:border-right="none" fo:border-top="none" fo:border-bottom="1.5pt solid #888888"/>
      <style:text-properties fo:color="#222222" loext:opacity="100%"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Body_20_Text.topinst" style:display-name="Body Text.topinst" style:family="paragraph" style:parent-style-name="Text_20_body">
      <style:paragraph-properties fo:padding="0.0835in" fo:border="0.06pt solid #cccc88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192 Validation Checklist</dc:title>
    <meta:generator>LibreOffice/24.2.7.2$Linux_X86_64 LibreOffice_project/420$Build-2</meta:generator>
    <dc:date>2026-04-27T22:11:07.950859410</dc:date>
    <meta:editing-duration>PT5M15S</meta:editing-duration>
    <meta:editing-cycles>1</meta:editing-cycles>
    <meta:document-statistic meta:table-count="0" meta:image-count="0" meta:object-count="0" meta:page-count="13" meta:paragraph-count="276" meta:word-count="2066" meta:character-count="13391" meta:non-whitespace-character-count="11299"/>
    <meta:user-defined meta:name=""/>
  </office:meta>
</office:document-meta>
</file>