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192 — Round 2 Narrations Review (10 fresh samples)</text:p>
      <text:p text:style-name="Text_20_body">Generated 2026-04-27. All 10 cleared the validator after iterative fixes</text:p>
      <text:p text:style-name="Text_20_body">(spelled-out distance evasion, modern-business-name leak via case bug,</text:p>
      <text:p text:style-name="Text_20_body">modern-person-name leak, witch-trials-predates hallucination guard).</text:p>
      <text:p text:style-name="Text_20_body"><text:span text:style-name="T1">Stats:</text:span> 10 OK / 10 eligible. No rejections.</text:p>
      <text:p text:style-name="Horizontal_20_Line"/>
      <text:h text:style-name="Heading_20_2" text:outline-level="2">✓ Crowninshield-Bentley House (1727, RICH, 137 words — 2 stripped)</text:h>
      <text:p text:style-name="Text_20_body"><text:span text:style-name="T1">Key claims:</text:span> built 1727, Crowninshield family, Reverend William Bentley resident 1794–1819 (post-1776 framing OK).</text:p>
      <text:p text:style-name="Quotations">Crowninshield-Bentley House stands within the Province of Massachusetts Bay, a structure dating to approximately the year 1727. It was first raised for the Crowninshield family, establishing them as its original owners. For many years, this dwelling provided a home and hearth for generations of that name. Later, in the year 1794, Reverend William Bentley took up residence, lodging within its walls until his passing in 1819. He occupied the house as a tenant during a significant portion of his life, and it served as a center for his scholarly pursuits and daily life. The house stands in proximity to other structures of note, though their particulars are not within my recollection. The building itself, while of modest description in the records I possess, appears to be of sound construction, a testament to the builders of that era.</text:p>
      <text:p text:style-name="P2">Your verdict:</text:p>
      <text:list text:style-name="L1">
        <text:list-item>
          <text:p text:style-name="P4"><text:span text:style-name="Teletype"><text:span text:style-name="T1">[   ]</text:span></text:span>   Approve as-is </text:p>
        </text:list-item>
        <text:list-item>
          <text:p text:style-name="P4"><text:span text:style-name="Teletype"><text:span text:style-name="T1">[   ]</text:span></text:span>   Reject — facts wrong (explain) </text:p>
        </text:list-item>
        <text:list-item>
          <text:p text:style-name="P3"><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Derby House (1762, RICH, 173 words — 1 stripped)</text:h>
      <text:p text:style-name="Text_20_body"><text:span text:style-name="T1">Key claims:</text:span> built 1762, brick, wedding gift from Richard Derby (Salem merchant) to son Elias Hasket Derby, near Derby Wharf.</text:p>
      <text:p text:style-name="Quotations">The House, as it stands upon Derby Street, was raised in the year 1762. It is a structure of brick, commissioned by Richard Derby, a Salem merchant, as a wedding gift for his son, Elias Hasket Derby. Mr. Derby, a man of considerable means, ensured the construction was fitting for the occasion and for a family rising in prominence within the Province of Massachusetts Bay. The house was intended as a residence for Elias Hasket Derby, and he took possession of it upon its completion. The location was chosen with purpose, reflecting the family's deep involvement in trade and seafaring pursuits. While the details of its early architectural features are not fully recorded, the very materials speak to a solid and enduring construction, intended to withstand the coastal elements. The house served as a home, a testament to the prosperity and standing of the Derby family within the colony. It is a silent witness to the ebb and flow of life in Salem, a town increasingly reliant upon the sea for its fortune.</text:p>
      <text:p text:style-name="P2">Your verdict:</text:p>
      <text:list text:style-name="L2">
        <text:list-item>
          <text:p text:style-name="P6"><text:span text:style-name="Teletype"><text:span text:style-name="T1">[   ]</text:span></text:span>   Approve as-is </text:p>
        </text:list-item>
        <text:list-item>
          <text:p text:style-name="P6"><text:span text:style-name="Teletype"><text:span text:style-name="T1">[   ]</text:span></text:span>   Reject — facts wrong (explain) </text:p>
        </text:list-item>
        <text:list-item>
          <text:p text:style-name="P5"><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Fort Lee (1776, RICH, 195 words)</text:h>
      <text:p text:style-name="Text_20_body"><text:span text:style-name="T1">Key claims:</text:span> built 1776, Salem Neck, defensive fortification against Great Britain, "newly-declared United States" framing, located within Salem Willows.</text:p>
      <text:p text:style-name="Quotations">Fort Lee stands upon Salem Neck, a fortification of some note in the annals of this colony. Constructed circa 1776, it arose as a response to the troubles with Great Britain, a relatively rare and unaltered example of a work built during that period of unrest. It is a place of earth and timber, designed to guard the harbor and the fledgling interests of the newly-declared United States. The site itself lies within the bounds of Salem Willows, a favored locale for respite and recreation. Though the fort's early construction details are not fully recorded, its purpose was clear: to provide a defensive position against naval incursions. While specific details of its initial garrison remain elusive, it served as a vital component in the coastal defenses of Massachusetts. The fort's placement allowed for observation and engagement of any vessels approaching the harbor, a critical function in those uncertain times. It is a work built not for show, but for purpose, a testament to the resolve of those who sought to secure their liberties. The earthworks themselves, though simple in design, represent a significant undertaking, a physical manifestation of the colony's commitment to its own defense.</text:p>
      <text:p text:style-name="P2">Your verdict:</text:p>
      <text:list text:style-name="L3">
        <text:list-item>
          <text:p text:style-name="P8"><text:span text:style-name="Teletype"><text:span text:style-name="T1">[   ]</text:span></text:span>   Approve as-is </text:p>
        </text:list-item>
        <text:list-item>
          <text:p text:style-name="P8"><text:span text:style-name="Teletype"><text:span text:style-name="T1">[   ]</text:span></text:span>   Reject — facts wrong (explain) </text:p>
        </text:list-item>
        <text:list-item>
          <text:p text:style-name="P7"><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Central Wharf (1790, RICH, 123 words — 1 stripped)</text:h>
      <text:p text:style-name="Text_20_body"><text:span text:style-name="T1">Key claims:</text:span> completed 1790, Derby Street area, maritime commerce hub.</text:p>
      <text:p text:style-name="Quotations">Central Wharf stands within Derby Street &amp; Derby Wharf, a substantial undertaking completed circa 1790. The wharf, like others along this harbor, served as a vital link in the commerce that sustained the town and connected it to distant ports. While the names of those who first directed its construction are not readily available, the wharf quickly became integral to the flow of goods and materials. Its sturdy construction and strategic positioning facilitated the loading and unloading of vessels engaged in trade. The wharf's very existence testifies to the ambition and enterprise of the merchants and mariners who built and utilized it. It is a testament to the industrious spirit that characterized this port town in the early decades of the United States.</text:p>
      <text:p text:style-name="P2">Your verdict:</text:p>
      <text:list text:style-name="L4">
        <text:list-item>
          <text:p text:style-name="P10"><text:span text:style-name="Teletype"><text:span text:style-name="T1">[   ]</text:span></text:span>   Approve as-is </text:p>
        </text:list-item>
        <text:list-item>
          <text:p text:style-name="P10"><text:span text:style-name="Teletype"><text:span text:style-name="T1">[   ]</text:span></text:span>   Reject — facts wrong (explain) </text:p>
        </text:list-item>
        <text:list-item>
          <text:p text:style-name="P9"><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Historic Derby Wharf (1791, RICH, 197 words)</text:h>
      <text:p text:style-name="Text_20_body"><text:span text:style-name="T1">Key claims:</text:span> completed 1791, shares location with <text:span text:style-name="T2">Friendship of Salem</text:span> vessel, Commonwealth of Massachusetts maritime trade hub. (Modern-business-name leak from prior runs FIXED.)</text:p>
      <text:p text:style-name="Quotations">Historic Derby Wharf stands within the bounds of Derby Street and Derby Wharf, a testament to the maritime enterprise of the Commonwealth of Massachusetts. Construction commenced circa 1791, establishing a new pier to facilitate the growing trade of Salem. It is known that the Wharf shares its location with the vessel <text:span text:style-name="T2">Friendship</text:span>, a point of intersection for those engaged in commerce. While records do not detail the hand of a single architect or builder, the Wharf arose from the ambition of merchants seeking to expand the reach of Salem's trade. It quickly became a hub for vessels engaged in both domestic and foreign exchange, contributing to the prosperity of the town. The Wharf's very structure, extending into the harbor, speaks to the ingenuity employed in accommodating larger and more numerous ships. Though the specific details of early occupants remain obscured, it is clear that the Wharf played a vital role in the flow of goods and people. The very presence of the <text:span text:style-name="T2">Friendship</text:span> alongside suggests a continued association with seafaring pursuits. The Wharf stands as a silent witness to the ebb and flow of commerce, a tangible link to a period of burgeoning trade and maritime power.</text:p>
      <text:p text:style-name="P2">Your verdict:</text:p>
      <text:list text:style-name="L5">
        <text:list-item>
          <text:p text:style-name="P12"><text:span text:style-name="Teletype"><text:span text:style-name="T1">[   ]</text:span></text:span>   Approve as-is </text:p>
        </text:list-item>
        <text:list-item>
          <text:p text:style-name="P12"><text:span text:style-name="Teletype"><text:span text:style-name="T1">[   ]</text:span></text:span>   Reject — facts wrong (explain) </text:p>
        </text:list-item>
        <text:list-item>
          <text:p text:style-name="P11"><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Nathaniel Hawthorne's Birthplace (1804, STANDARD, 101 words)</text:h>
      <text:p text:style-name="Text_20_body"><text:span text:style-name="T1">Key claims:</text:span> built 1804, Hathorne family home (correct surname spelling for that era — "Hathorne", not "Hawthorne"), Hawthorne born to Nathaniel Hathorne and Elizabeth Manning. (Witch-trials-predates hallucination from prior run FIXED.)</text:p>
      <text:p text:style-name="Quotations">Nathaniel Hawthorne's Birthplace, a dwelling constructed circa 1804 within the Commonwealth of Massachusetts, stands as a testament to early domestic architecture in Salem. The structure first sheltered members of the Hathorne family, ancestors of the famed novelist. It was within these walls that Nathaniel Hawthorne himself first drew breath, a son of Nathaniel Hathorne and Elizabeth Manning. The house, built of timber and clapboard, reflected the building practices common to the era. Though details of its earliest architectural features remain scarce in available records, it represented a solid and respectable home for a family establishing itself in the growing United States.</text:p>
      <text:p text:style-name="P2">Your verdict:</text:p>
      <text:list text:style-name="L6">
        <text:list-item>
          <text:p text:style-name="P14"><text:span text:style-name="Teletype"><text:span text:style-name="T1">[   ]</text:span></text:span>   Approve as-is </text:p>
        </text:list-item>
        <text:list-item>
          <text:p text:style-name="P14"><text:span text:style-name="Teletype"><text:span text:style-name="T1">[   ]</text:span></text:span>   Reject — facts wrong (explain) </text:p>
        </text:list-item>
        <text:list-item>
          <text:p text:style-name="P13"><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Salem Athenæum (1810, STANDARD, 71 words — 1 stripped)</text:h>
      <text:p text:style-name="Text_20_body"><text:span text:style-name="T1">Key claims:</text:span> founded 1810, 50K+ volumes, Federal architectural style, Commonwealth of Massachusetts cultural institution.</text:p>
      <text:p text:style-name="Quotations">Salem Athenæum stands as a cultural establishment within the town of Salem, Massachusetts. Formed in the year eighteen hundred and ten, it serves as a repository of knowledge, holding a collection exceeding fifty thousand volumes and fostering a variety of learned pursuits. The building itself, constructed around 1790, exhibits a Federal architectural style. It is a structure of note, standing amongst its neighbors and contributing to the character of the Commonwealth.</text:p>
      <text:p text:style-name="P2">Your verdict:</text:p>
      <text:list text:style-name="L7">
        <text:list-item>
          <text:p text:style-name="P16"><text:span text:style-name="Teletype"><text:span text:style-name="T1">[   ]</text:span></text:span>   Approve as-is </text:p>
        </text:list-item>
        <text:list-item>
          <text:p text:style-name="P16"><text:span text:style-name="Teletype"><text:span text:style-name="T1">[   ]</text:span></text:span>   Reject — facts wrong (explain) </text:p>
        </text:list-item>
        <text:list-item>
          <text:p text:style-name="P15"><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Old Town Hall (1816, STANDARD, 94 words — 2 stripped)</text:h>
      <text:p text:style-name="Text_20_body"><text:span text:style-name="T1">Key claims:</text:span> built 1816, earliest surviving municipal building in Salem, Federal style. (Modern-employee-names leak FIXED. NOTE: Charles Bulfinch attribution that appeared in a prior run is missing here — model is non-deterministic on this fact.)</text:p>
      <text:p text:style-name="Quotations">Old Town Hall, a spacious and iconic structure, was erected circa 1816 in the thriving town of Salem, within the Commonwealth of Massachusetts. It stands as the earliest surviving municipal building in Salem, a testament to the town's growing civic pride. Constructed in the Federal style, the Hall quickly became a prominent feature of the downtown landscape. While records do not detail the original builder or architect, the structure served as a center for the town's governance and public life. It is known that the City of Salem held ownership of this important building.</text:p>
      <text:p text:style-name="P2">Your verdict:</text:p>
      <text:list text:style-name="L8">
        <text:list-item>
          <text:p text:style-name="P18"><text:span text:style-name="Teletype"><text:span text:style-name="T1">[   ]</text:span></text:span>   Approve as-is </text:p>
        </text:list-item>
        <text:list-item>
          <text:p text:style-name="P18"><text:span text:style-name="Teletype"><text:span text:style-name="T1">[   ]</text:span></text:span>   Reject — facts wrong (explain) </text:p>
        </text:list-item>
        <text:list-item>
          <text:p text:style-name="P17"><text:span text:style-name="Teletype"><text:span text:style-name="T1">[   ]</text:span></text:span>   Needs edit (explain) — e.g. "want Charles Bulfinch attribution" </text:p>
        </text:list-item>
      </text:list>
      <text:p text:style-name="Text_20_body">Notes: ____________________________________________________________</text:p>
      <text:p text:style-name="Horizontal_20_Line"/>
      <text:h text:style-name="Heading_20_2" text:outline-level="2">✓ Andrew Safford House (1819, STANDARD, 85 words — 1 stripped)</text:h>
      <text:p text:style-name="Text_20_body"><text:span text:style-name="T1">Key claims:</text:span> built 1819 (year drift from prior run FIXED), Andrew Safford as original owner, Federal style.</text:p>
      <text:p text:style-name="Quotations">Andrew Safford House stands as a testament to the early years of the Commonwealth of Massachusetts. Constructed circa 1819, the residence first belonged to Andrew Safford. Its architecture reflects the tastes of the period, a building of some note amongst its neighbors. The house shares the neighborhood with several other dwellings, each a part of the fabric of Salem town. It is a building of Federal style, and stands as a quiet witness to the years before the great changes sweeping across the United States.</text:p>
      <text:p text:style-name="P2">Your verdict:</text:p>
      <text:list text:style-name="L9">
        <text:list-item>
          <text:p text:style-name="P20"><text:span text:style-name="Teletype"><text:span text:style-name="T1">[   ]</text:span></text:span>   Approve as-is </text:p>
        </text:list-item>
        <text:list-item>
          <text:p text:style-name="P20"><text:span text:style-name="Teletype"><text:span text:style-name="T1">[   ]</text:span></text:span>   Reject — facts wrong (explain) </text:p>
        </text:list-item>
        <text:list-item>
          <text:p text:style-name="P19"><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 14 Mall Street (Scarlet Letter House) (1847, STANDARD, 96 words — 1 stripped)</text:h>
      <text:p text:style-name="Text_20_body"><text:span text:style-name="T1">Key claims:</text:span> built 1847, Hawthorne residency, Hawthorne wrote portions of <text:span text:style-name="T2">The Scarlet Letter</text:span> there.</text:p>
      <text:p text:style-name="Quotations">It was erected circa 1847, a dwelling of some solidity in a growing town. While the years since its construction are yet few, it is known to be associated with the name of Nathaniel Hawthorne, a gentleman of letters who resided there for a time. Indeed, it is within these walls that he penned portions of his renowned work, <text:span text:style-name="T2">The Scarlet Letter</text:span>, a tale of the Commonwealth and its early years. The building stands as a testament to the architectural tastes of the period, though detailed accounts of its original design are not readily at hand.</text:p>
      <text:p text:style-name="P2">Your verdict:</text:p>
      <text:list text:style-name="L10">
        <text:list-item>
          <text:p text:style-name="P22"><text:span text:style-name="Teletype"><text:span text:style-name="T1">[   ]</text:span></text:span>   Approve as-is </text:p>
        </text:list-item>
        <text:list-item>
          <text:p text:style-name="P22"><text:span text:style-name="Teletype"><text:span text:style-name="T1">[   ]</text:span></text:span>   Reject — facts wrong (explain) </text:p>
        </text:list-item>
        <text:list-item>
          <text:p text:style-name="P21"><text:span text:style-name="Teletype"><text:span text:style-name="T1">[   ]</text:span></text:span>   Needs edit (explain) </text:p>
        </text:list-item>
      </text:list>
      <text:p text:style-name="Text_20_body">Notes: ____________________________________________________________</text:p>
      <text:p text:style-name="Horizontal_20_Line"/>
      <text:h text:style-name="Heading_20_2" text:outline-level="2">Final approval</text:h>
      <text:list text:style-name="L11">
        <text:list-item>
          <text:p text:style-name="P24"><text:span text:style-name="Teletype"><text:span text:style-name="T1">[   ]</text:span></text:span>   APPROVED — proceed with full population run (~565 eligible HISTORICAL_BUILDINGS) </text:p>
        </text:list-item>
        <text:list-item>
          <text:p text:style-name="P24"><text:span text:style-name="Teletype"><text:span text:style-name="T1">[   ]</text:span></text:span>   APPROVED with the changes noted above (apply, then re-test these 10, then proceed) </text:p>
        </text:list-item>
        <text:list-item>
          <text:p text:style-name="P23"><text:span text:style-name="Teletype"><text:span text:style-name="T1">[   ]</text:span></text:span>   NOT APPROVED — significant rework needed (explain below) </text:p>
        </text:list-item>
      </text:list>
      <text:p text:style-name="Text_20_body">Overall notes: ____________________________________________________________</text:p>
      <text:p text:style-name="Text_20_body">________________________________________________________________________</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sans-serif" fo:font-family="sans-serif" fo:font-size="11pt" style:font-name-asian="sans-serif" style:font-family-asian="sans-serif" style:font-size-asian="11pt" style:font-name-complex="sans-serif" style:font-family-complex="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fo:color="#000000" loext:opacity="100%" style:font-name="Noto Sans" fo:font-family="'Noto San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padding="0in" fo:border="none"/>
      <style:text-properties fo:color="#000000" loext:opacity="100%" style:font-name="Liberation Serif" fo:font-family="'Liberation Serif'" style:font-family-generic="roman" style:font-pitch="variable" fo:font-size="15pt" fo:font-weight="bold" style:font-name-asian="Noto Serif CJK SC" style:font-family-asian="'Noto Serif CJK SC'" style:font-family-generic-asian="system" style:font-pitch-asian="variable" style:font-size-asian="15pt" style:font-weight-asian="bold" style:font-name-complex="Noto Sans Devanagari1" style:font-family-complex="'Noto Sans Devanagari'" style:font-family-generic-complex="system" style:font-pitch-complex="variable" style:font-size-complex="15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padding-left="0in" fo:padding-right="0in" fo:padding-top="0in" fo:padding-bottom="0.0311in" fo:border-left="none" fo:border-right="none" fo:border-top="none" fo:border-bottom="1.5pt solid #888888"/>
      <style:text-properties fo:color="#222222"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fo:padding-left="0.0193in" fo:padding-right="0in" fo:padding-top="0in" fo:padding-bottom="0in" fo:border-left="2.24pt solid #888888" fo:border-right="none" fo:border-top="none" fo:border-bottom="non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192 Round 2 Narrations Review</dc:title>
    <meta:document-statistic meta:table-count="0" meta:image-count="0" meta:object-count="0" meta:page-count="1" meta:paragraph-count="91" meta:word-count="1868" meta:character-count="12302" meta:non-whitespace-character-count="10371"/>
    <meta:generator>LibreOffice/24.2.7.2$Linux_X86_64 LibreOffice_project/420$Build-2</meta:generator>
    <meta:user-defined meta:name=""/>
  </office:meta>
</office:document-meta>
</file>