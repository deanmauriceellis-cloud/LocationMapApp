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2" style:family="paragraph" style:parent-style-name="Standard">
      <style:text-properties officeooo:paragraph-rsid="00103260"/>
    </style:style>
    <style:style style:name="T1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style:font-size-asian="12pt" style:font-name-complex="Times New Roman1" style:font-size-complex="12pt"/>
    </style:style>
    <style:style style:name="T3" style:family="text">
      <style:text-properties officeooo:rsid="001032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List_20_Paragraph" loext:marker-style-name="T2"><text:span text:style-name="T1">Hawthorne Hotel<text:line-break/>18 Washington Square</text:span><text:span text:style-name="T1"/></text:p>
      <text:p text:style-name="P1" loext:marker-style-name="T2"/>
      <text:p text:style-name="Standard" loext:marker-style-name="T2"><text:span text:style-name="T2"/></text:p>
      <text:p text:style-name="P2" loext:marker-style-name="T2"><text:span text:style-name="T2">The land on which the hotel sits was occupied since at least 1675, with Colonel Higginson constructing a large house. <text:s/>In 1809 the lot came into the hands of Colonel Archer who employed Samuel McIntire to build a brick structure used for offices and stores becoming known as the Archer Block. <text:s/>Captain Thomas Perkins came into possession in 1818 and renamed it the Franklin Building. <text:s/>Upon his death in 1833, his estate gives over the property to the Salem Marine Society of which Captain Perkins was a member. <text:s/></text:span></text:p>
      <text:p text:style-name="P2" loext:marker-style-name="T2"><text:span text:style-name="T2">The Salem Marine Society used it as their headquarters until agreeing to sell the lot with the condition that the group could continue to meet at the site. <text:s/></text:span><text:span text:style-name="T2"/></text:p>
      <text:p text:style-name="Standard" loext:marker-style-name="T2"><text:span text:style-name="T2">The hotel is named after Nathaniel Hawthorne born and raised in Salem and famous for his works, “The Scarlet Letter,” and “The House of the Seven Gables.”</text:span></text:p>
      <text:p text:style-name="Standard" loext:marker-style-name="T2"><text:span text:style-name="T2"/></text:p>
      <text:p text:style-name="P2" loext:marker-style-name="T2"><text:span text:style-name="T2"/></text:p>
      <text:p text:style-name="P2" loext:marker-style-name="T2"><text:span text:style-name="T2">The history of the hotel begins when visitation to Salem increased. <text:s/>Business leaders in the community realized the need for a hotel. <text:s/>Frank Poor, founder of Sylvania, imagined a hotel in the town center and in conjunction with the Salem Chamber of Commerce and Salem Rotary, raised $500,000. <text:s/>More than one thousand residents and businesses invested in the hotel through purchase of public stock. <text:s/></text:span></text:p>
      <text:p text:style-name="P2" loext:marker-style-name="T2">Artists, actors, and political figures such as Bette Davis, Johnny Cash, and former President Bill Clinton have graced the halls of the Hawthorne Hotel. <text:s/>The cast of “Bewitched” stayed at the hotel during filming increased the hotel’s popularity<text:bookmark text:name="_GoBack"/>. <text:s/><text:span text:style-name="T3">T</text:span>he hotel <text:span text:style-name="T3">recently </text:span>celebrated its one hundredth anniversary. <text:s/></text:p>
      <text:p text:style-name="P1" loext:marker-style-name="T2"/>
      <text:p text:style-name="P1" loext:marker-style-name="T2"/>
      <text:p text:style-name="P1" loext:marker-style-name="T2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6874in"/>
        </style:list-level-properties>
      </text:list-level-style-number>
      <text:list-level-style-number text:level="3" text:style-name="ListLabel_20_3" loext:num-list-format="%3%" style:num-format="1" text:start-value="2">
        <style:list-level-properties text:list-level-position-and-space-mode="label-alignment">
          <style:list-level-label-alignment text:label-followed-by="listtab" fo:text-indent="-0.25in" fo:margin-left="1.6252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" style:num-format="1" text:start-value="2">
        <style:list-level-properties text:list-level-position-and-space-mode="label-alignment">
          <style:list-level-label-alignment text:label-followed-by="listtab" fo:text-indent="-0.25in" fo:margin-left="1.6252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374in"/>
        </style:list-level-properties>
      </text:list-level-style-number>
      <text:list-level-style-number text:level="3" text:style-name="ListLabel_20_57" loext:num-list-format="%3%" style:num-format="1" text:start-value="2">
        <style:list-level-properties text:list-level-position-and-space-mode="label-alignment">
          <style:list-level-label-alignment text:label-followed-by="listtab" fo:text-indent="-0.25in" fo:margin-left="1.6252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athleen</meta:initial-creator>
    <meta:editing-cycles>95</meta:editing-cycles>
    <meta:print-date>2025-12-21T19:10:00</meta:print-date>
    <meta:creation-date>2025-07-20T19:56:00</meta:creation-date>
    <dc:date>2026-05-14T19:59:27.874966667</dc:date>
    <meta:editing-duration>P1DT21H12M34S</meta:editing-duration>
    <meta:generator>LibreOffice/24.2.7.2$Linux_X86_64 LibreOffice_project/420$Build-2</meta:generator>
    <meta:document-statistic meta:table-count="0" meta:image-count="0" meta:object-count="0" meta:page-count="1" meta:paragraph-count="6" meta:word-count="258" meta:character-count="1568" meta:non-whitespace-character-count="1300"/>
    <meta:user-defined meta:name="AppVersion">15.0000</meta:user-defined>
    <meta:template xlink:type="simple" xlink:actuate="onRequest" xlink:title="Normal" xlink:href=""/>
  </office:meta>
</office:document-meta>
</file>