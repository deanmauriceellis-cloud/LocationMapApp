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b0266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b0266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List_20_Paragraph" loext:marker-style-name="T2"><text:span text:style-name="T1">Witch Museum (formerly East Church)<text:line-break/>19 ½ Washington Square North</text:span><text:span text:style-name="T1"/></text:p>
      <text:p text:style-name="Standard" loext:marker-style-name="T2"><text:span text:style-name="T2"><text:s/></text:span><text:span text:style-name="T2"/></text:p>
      <text:p text:style-name="P1" loext:marker-style-name="T2"><text:span text:style-name="T2">The Witch Museum </text:span></text:p>
      <text:p text:style-name="P1" loext:marker-style-name="T2"><text:span text:style-name="T2"/></text:p>
      <text:p text:style-name="P1" loext:marker-style-name="T2"><text:span text:style-name="T3">The East Church </text:span><text:span text:style-name="T2">housed in the Gothic Revival built between 1844 and 1846 by the New York architect, Minard LaFever. <text:s/>LaFever built a large number of churches in the early nineteenth century several of which are designated National Historic Landmarks including the St. Ann and Holy Trinity Church in Brooklyn. <text:s/>Many of the choices for his construction are visible including pointed arched windows and the use of brownstone. <text:s/>The front octagonal towers were higher at some point but cut down to their present height. <text:s/>The East Church broke off from the First Church at the turn of the eighteenth century, but the two were reunited in 1956. <text:s/>The building was thus sold at that time after having survived two fires; one in 1902, and the other in 1925. <text:s/></text:span></text:p>
      <text:p text:style-name="P1" loext:marker-style-name="T2"><text:span text:style-name="T2">The third fire in 1969 would end the residence of the Salem Auto Museum and Americana Shops and make way for the Witch Museum to open in 1972.</text:span></text:p>
      <text:p text:style-name="Standard" loext:marker-style-name="T2"><text:span text:style-name="T2">The land upon which the </text:span><text:span text:style-name="T3">Witch M</text:span><text:span text:style-name="T2">useum sits </text:span><text:span text:style-name="T3">upon </text:span><text:span text:style-name="T2">has ties to the Salem Witch Trials. <text:s/>The Reverend John Higginson, a minister of the First Church, lived on the site. <text:s/>His father organized the First Church, and John Higginson would go on to minister for 48 years. <text:s/>His daughter, Ann Dolliver, was accused of witchcraft during the trials. <text:s/>Abandoned by her husband and left with three children, Ann moved back into her father’s house in Salem from Gloucester. <text:s/>In June of 1692, she was charged with having committed “sundry acts of witchcraft.” Her accusers were three of the afflicted girls who helped set the chaos in motion: <text:s/>Mary Warren, Mary Wolcott, and Susanna Sheldon. <text:s/>Fortunately, she was able to return to her family’s home after being questioned</text:span><text:bookmark text:name="_GoBack"/><text:span text:style-name="T2">. <text:s text:c="2"/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meta:editing-cycles>96</meta:editing-cycles>
    <meta:print-date>2025-12-21T19:10:00</meta:print-date>
    <meta:creation-date>2025-07-20T19:56:00</meta:creation-date>
    <dc:date>2026-05-12T20:01:51.240160203</dc:date>
    <meta:editing-duration>P1DT20H5M54S</meta:editing-duration>
    <meta:generator>LibreOffice/24.2.7.2$Linux_X86_64 LibreOffice_project/420$Build-2</meta:generator>
    <meta:document-statistic meta:table-count="0" meta:image-count="0" meta:object-count="0" meta:page-count="1" meta:paragraph-count="6" meta:word-count="296" meta:character-count="1730" meta:non-whitespace-character-count="1420"/>
    <meta:user-defined meta:name="AppVersion">15.0000</meta:user-defined>
    <meta:template xlink:type="simple" xlink:actuate="onRequest" xlink:title="Normal" xlink:href=""/>
  </office:meta>
</office:document-meta>
</file>