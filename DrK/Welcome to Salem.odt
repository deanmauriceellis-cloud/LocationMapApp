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text-position="super 58%"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 loext:marker-style-name="T1"><text:span text:style-name="T1">Welcome to Salem! <text:s/></text:span><text:span text:style-name="T1"/></text:p>
      <text:p text:style-name="Standard" loext:marker-style-name="T1"><text:span text:style-name="T1">Great, now what? <text:s/>It could be that you decided to stop in town after reading about it in a newspaper or magazine. <text:s/>You may have had business in Boston and took the train up for a visit, or you are visiting relatives, or even checking out National Parks. <text:s/>It could also be that maybe, just maybe, Salem has been on your on your bucket list since you first learned about the infamous witch trials of 1692.</text:span><text:span text:style-name="T1"/></text:p>
      <text:p text:style-name="Standard" loext:marker-style-name="T1"><text:span text:style-name="T1">In 1975, the Salem Bicentennial Commission issues a guide to Salem to celebrate the United States Bicentennial and the 350</text:span><text:span text:style-name="T2">th</text:span><text:span text:style-name="T1"> anniversary of the founding of Salem. <text:s/>The authors stated that they hoped to provide a “How, What, Where, and When” for visitors in order for them to “fully enjoy and appreciate Salem.”</text:span></text:p>
      <text:p text:style-name="Standard" loext:marker-style-name="T1"><text:span text:style-name="T1">This year we celebrate the 400</text:span><text:span text:style-name="T2">th</text:span><text:span text:style-name="T1"> anniversary of the founding of Salem, and the Semi-Quincentennial of the United States, but the purpose of this online guide is still the same. <text:s/>As you walk through the town, you will learn a great deal about Salem beyond the witch trials. <text:s/>It is certainly true that the infamous </text:span><text:bookmark text:name="_GoBack"/><text:span text:style-name="T1">event has put Salem on the map, but did you know that Salem was a rich, bustling port after the American Revolution? <text:s/>Did you know that Salem merchants traded with the Far East and when their ships returned they were loaded with incredible goods such as coffee, tea, silks, and spices? <text:s/>Salem has been called home by authors, educators, political leaders, abolitionist, artists, and America’s first millionaire. <text:s/>It is their stories that will be told on this tour. <text:s/></text:span></text:p>
      <text:p text:style-name="Standard" loext:marker-style-name="T1"><text:span text:style-name="T1">Our motto is, “Salem: <text:s/>We are more than just witches.”</text:span><text:span text:style-name="T1"/></text:p>
      <text:p text:style-name="P1" loext:marker-style-name="T1"/>
      <text:p text:style-name="P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6</meta:editing-cycles>
    <meta:creation-date>2025-12-19T22:24:00</meta:creation-date>
    <dc:date>2026-05-02T12:33:00</dc:date>
    <meta:editing-duration>PT39M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274" meta:character-count="1565" meta:non-whitespace-character-count="1282"/>
    <meta:user-defined meta:name="AppVersion">15.0000</meta:user-defined>
    <meta:template xlink:type="simple" xlink:actuate="onRequest" xlink:title="Normal" xlink:href=""/>
  </office:meta>
</office:document-meta>
</file>