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25in"/>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List_20_Paragraph" loext:marker-style-name="T1"><text:span text:style-name="T1"><text:s/>Old Armory<text:line-break/>2 New Liberty Street</text:span><text:span text:style-name="T1"/></text:p>
      <text:p text:style-name="P1" loext:marker-style-name="T2"><text:span text:style-name="T2">The building you are standing in front of was once the Salem Armory home to the Second Corp of Cadets, a branch of the Massachusetts National Guard. <text:s/>The property was once owned by Colonel Francis Peabody and built in a late Federal style the site in 1820, with the later addition of a large banquet hall. <text:s/>Armories across the country usually were built with a head house (which was administrative) and a drill shed for training. <text:s/>After the purchase of the property by the Second Corps of Cadets in 1890, a drill shed was added in the back. <text:s/>In 1908, the Peabody mansion was demolished and a new head house constructed with the back drill shed incorprated</text:span><text:bookmark text:name="_GoBack"/><text:span text:style-name="T2"> into the new design.</text:span><text:span text:style-name="T2"/></text:p>
      <text:p text:style-name="P1" loext:marker-style-name="T2"><text:span text:style-name="T2">When a fire destroyed the head house in 1982, what was left of the drill shed in the back became the Salem Regional Visitor Center run by the National Park Service which opened in 1994. <text:s/>The park was added in the spot where the head house was located in 2002. <text:s text:c="5"/></text:span><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6874in"/>
        </style:list-level-properties>
      </text:list-level-style-number>
      <text:list-level-style-number text:level="3" text:style-name="ListLabel_20_3" loext:num-list-format="%3%" style:num-format="1" text:start-value="2">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format="1" text:start-value="2">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9374in"/>
        </style:list-level-properties>
      </text:list-level-style-number>
      <text:list-level-style-number text:level="3" text:style-name="ListLabel_20_57" loext:num-list-format="%3%" style:num-format="1" text:start-value="2">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thleen</meta:initial-creator>
    <dc:creator>Kathleen</dc:creator>
    <meta:editing-cycles>97</meta:editing-cycles>
    <meta:print-date>2025-12-21T19:10:00</meta:print-date>
    <meta:creation-date>2025-07-20T19:56:00</meta:creation-date>
    <dc:date>2026-05-14T10:26:00</dc:date>
    <meta:editing-duration>P1DT18H39M</meta:editing-duration>
    <meta:generator>LibreOffice/24.2.7.2$Linux_X86_64 LibreOffice_project/420$Build-2</meta:generator>
    <meta:document-statistic meta:table-count="0" meta:image-count="0" meta:object-count="0" meta:page-count="1" meta:paragraph-count="3" meta:word-count="177" meta:character-count="973" meta:non-whitespace-character-count="787"/>
    <meta:user-defined meta:name="AppVersion">15.0000</meta:user-defined>
    <meta:template xlink:type="simple" xlink:actuate="onRequest" xlink:title="Normal" xlink:href=""/>
  </office:meta>
</office:document-meta>
</file>