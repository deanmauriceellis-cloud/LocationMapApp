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in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 loext:marker-style-name="T2"><text:span text:style-name="T1">Revere Bell<text:line-break/>2 New Liberty Street</text:span><text:span text:style-name="T2"> <text:line-break/><text:line-break/>The bell at 2 New Liberty Street was cast for the Reverend William Bentley in 1801 for the East Church. <text:s/>The surname Revere is often associated with the Patriot, Paul Revere, subject of Henry Wadsworth Longfellow’s poem, “The Midnight Ride of Paul Revere.” By trade, Paul Revere was a renowned silversmith who made all sorts of objects. <text:s/>In 1792, he took on the challenge to cast his first bell when it was discovered that there was a crack in the one at the Second Church in Boston. <text:s text:c="2"/>Successful, he continued to cast bells, becoming known for the clarity of tone they produced. <text:s/>Together with his son, he continued to make bells and many are scattered across New England</text:span><text:bookmark text:name="_GoBack"/><text:span text:style-name="T2">. <text:s/></text:span></text:p>
      <text:p text:style-name="P1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text:style-name="ListLabel_20_3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57" loext:num-list-format="%3%" style:num-format="1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hleen</meta:initial-creator>
    <dc:creator>Kathleen</dc:creator>
    <meta:editing-cycles>93</meta:editing-cycles>
    <meta:print-date>2025-12-21T19:10:00</meta:print-date>
    <meta:creation-date>2025-07-20T19:56:00</meta:creation-date>
    <dc:date>2026-05-12T21:12:00</dc:date>
    <meta:editing-duration>P1DT17H42M</meta:editing-duration>
    <meta:generator>LibreOffice/24.2.7.2$Linux_X86_64 LibreOffice_project/420$Build-2</meta:generator>
    <meta:document-statistic meta:table-count="0" meta:image-count="0" meta:object-count="0" meta:page-count="1" meta:paragraph-count="1" meta:word-count="124" meta:character-count="710" meta:non-whitespace-character-count="578"/>
    <meta:user-defined meta:name="AppVersion">15.0000</meta:user-defined>
    <meta:template xlink:type="simple" xlink:actuate="onRequest" xlink:title="Normal" xlink:href=""/>
  </office:meta>
</office:document-meta>
</file>