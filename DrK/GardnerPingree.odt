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left="0.5in" fo:margin-top="0in" fo:margin-bottom="0in" style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text-properties officeooo:paragraph-rsid="001faee5"/>
    </style:style>
    <style:style style:name="P4" style:family="paragraph" style:parent-style-name="Standard">
      <style:text-properties officeooo:paragraph-rsid="00200d84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200d84" style:font-size-asian="12pt" style:font-name-complex="Times New Roman1" style:font-size-complex="12pt"/>
    </style:style>
    <style:style style:name="T4" style:family="text">
      <style:text-properties style:use-window-font-color="true" loext:opacity="0%" style:font-name="Times New Roman" fo:font-size="12pt" style:text-underline-style="none" style:font-size-asian="12pt" style:font-name-complex="Times New Roman1" style:font-size-complex="12pt"/>
    </style:style>
    <style:style style:name="T5" style:family="text">
      <style:text-properties style:use-window-font-color="true" loext:opacity="0%" style:font-name="Times New Roman" fo:font-size="12pt" style:text-underline-style="none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List_20_Paragraph" loext:marker-style-name="T4"><text:span text:style-name="T1">Gardner-Pingree House<text:line-break/>128 Essex Street</text:span></text:p>
      <text:p text:style-name="P2" loext:marker-style-name="T2"/>
      <text:p text:style-name="P3" loext:marker-style-name="T2"><text:span text:style-name="T2">Financial ruin. <text:s/>Murder. <text:s/>The Gardner-Pingree house has certainly had its share of drama. <text:s/>The foreshadowing began in 1804 when a mason fell off the scaffolding while working on the construction of the house for John Gardner in 1804. <text:s/></text:span></text:p>
      <text:p text:style-name="P3" loext:marker-style-name="T2"><text:span text:style-name="T2">A wealthy importer of luxury goods, John Gardner had ships that sailed as far away as India and the house was built to showcase his success. <text:s/>Hiring Samuel McIntire, the house was designed with the familiar motifs of the woodcarver such as baskets of fruit, rosettes, and sheaves of wheat. <text:s/></text:span></text:p>
      <text:p text:style-name="P3" loext:marker-style-name="T2"><text:span text:style-name="T2">The War of 1812 interrupted his business, and he was suffering financially forcing him to sell to his brother-in-law for much needed cash. <text:s/>He moved to a family farm in 1815 where he resumed his business and died of typhus in 1847. <text:s/></text:span><text:span text:style-name="T2"/></text:p>
      <text:p text:style-name="Standard" loext:marker-style-name="T2"><text:span text:style-name="T2">By 1815, the house was in the hands of one of the most prosperous merchants of Salem, Captain Joseph White and his wife. <text:s/>A childless widower with no direct heirs, Captain White was sound asleep on the night of August 6, 1830. <text:s/>Two men waited outside while the third broke into his home and proceeded to bludgeon and stab him to death. <text:s/>The motive was purely financial. <text:s/>One of the men was married to Captain White’s favorite niece and he hoped that with his death, his wife would be the one to inherit his fortune. <text:s/></text:span><text:span text:style-name="T2"/></text:p>
      <text:p text:style-name="P4" loext:marker-style-name="T2"><text:span text:style-name="T2">The house lay empty after this tragedy </text:span></text:p>
      <text:p text:style-name="P4" loext:marker-style-name="T2"><text:span text:style-name="T2">David Pingree </text:span><text:span text:style-name="T3">purchased the house </text:span><text:span text:style-name="T2">1834. <text:s/>Having inherited a large fortune from his uncle, his ships traded across the globe. <text:s/>Unfortunately, he over-extended himself and was heavily in debt when he passed away in 1863. <text:s/>The house continued to stay within the family as his son was able to recover the family fortune enough to be considered one of the twenty richest men in Massachusetts. <text:s/>He died in 1932 at the age of 91. <text:s/></text:span></text:p>
      <text:p text:style-name="P3" loext:marker-style-name="T2"><text:span text:style-name="T2">His heirs gave the house to the care of the Essex Institute (now the Peabody Essex Museum) in 1933</text:span><text:bookmark text:name="_GoBack"/><text:span text:style-name="T2">. <text:s/></text:span><text:span text:style-name="T2"/></text:p>
      <text:p text:style-name="P1" loext:marker-style-name="T2"/>
      <text:p text:style-name="P1" loext:marker-style-name="T2"/>
      <text:p text:style-name="P1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3" text:style-name="ListLabel_20_3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374in"/>
        </style:list-level-properties>
      </text:list-level-style-number>
      <text:list-level-style-number text:level="3" text:style-name="ListLabel_20_57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thleen</meta:initial-creator>
    <meta:editing-cycles>95</meta:editing-cycles>
    <meta:print-date>2025-12-21T19:10:00</meta:print-date>
    <meta:creation-date>2025-07-20T19:56:00</meta:creation-date>
    <dc:date>2026-05-14T19:23:17.036625810</dc:date>
    <meta:editing-duration>P3DT20H57S</meta:editing-duration>
    <meta:generator>LibreOffice/24.2.7.2$Linux_X86_64 LibreOffice_project/420$Build-2</meta:generator>
    <meta:document-statistic meta:table-count="0" meta:image-count="0" meta:object-count="0" meta:page-count="1" meta:paragraph-count="8" meta:word-count="330" meta:character-count="1878" meta:non-whitespace-character-count="1530"/>
    <meta:user-defined meta:name="AppVersion">15.0000</meta:user-defined>
    <meta:template xlink:type="simple" xlink:actuate="onRequest" xlink:title="Normal" xlink:href=""/>
  </office:meta>
</office:document-meta>
</file>