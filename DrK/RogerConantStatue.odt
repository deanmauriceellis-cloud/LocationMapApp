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5in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left="0.5in"/>
    </style:style>
    <style:style style:name="P3" style:family="paragraph" style:parent-style-name="Standard">
      <style:paragraph-properties fo:margin-left="0.5in"/>
      <style:text-properties officeooo:paragraph-rsid="001df32f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df32f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List_20_Paragraph" loext:marker-style-name="T2"><text:span text:style-name="T1">Roger Conant Statue<text:line-break/>Brown and Washington Street</text:span><text:span text:style-name="T1"/></text:p>
      <text:p text:style-name="P1" loext:marker-style-name="T2"/>
      <text:p text:style-name="P2" loext:marker-style-name="T2"><text:span text:style-name="T2">By his appearance, one would think that the statue is a memorial to those accused of witchcraft. <text:s/></text:span><text:bookmark text:name="_GoBack"/><text:span text:style-name="T2">Roger Conant was one of the Old Planters of the colony, without whom there would not be a Salem. <text:s/>Described by his friends as a religious, sober, and prudent man, it is only fitting that he looks out over the Common to welcome in visitors to a place he once called home. <text:s text:c="3"/></text:span><text:span text:style-name="T2"/></text:p>
      <text:p text:style-name="P3" loext:marker-style-name="T2"><text:span text:style-name="T2">The statue of him was commissioned by his descendants in 1913, and the work done by English-American artist Henry Hudson Kitson. <text:s/>Kitson’s worked on other public monuments including The Minute Man in Lexington, Massachusetts, The Pilgrim Maidens in Plymouth, Massachusetts, and The Falconer, in Providence, Rhode Island. <text:s text:c="2"/></text:span></text:p>
      <text:p text:style-name="P3" loext:marker-style-name="T2"><text:span text:style-name="T2">Born in 1</text:span><text:span text:style-name="T3">59</text:span><text:span text:style-name="T2">2 in Devon, England, Roger Conant was the third son of a well-to-do yeoman. <text:s/>Trained as an apprentice, he became a salter; someone who was not only a preserver of various meats, but engaged in the trade and distribution of various products such as hemp and flax. <text:s/>We do not know exactly why he decided to make the journey to Plymouth, but he arrived in 1623. <text:s/></text:span></text:p>
      <text:p text:style-name="P3" loext:marker-style-name="T2"><text:span text:style-name="T2">By 1625, he was asked to manager the affairs of the Dorchester Company at Cape Ann. <text:s/>The company failed and many from Cape Ann scattered, some even giving up completely and returning to England. <text:s/>With his close friends, John Balch, and John Woodbury, Conant made the decision to leave for Naumkeg (now Salem</text:span><text:span text:style-name="T3">)</text:span><text:span text:style-name="T2"> and hold out until more settlers arrived. <text:s/>His son, little Roger Conant, was the first child born to the English in Naumkeg. <text:s/></text:span></text:p>
      <text:p text:style-name="P3" loext:marker-style-name="T2"><text:span text:style-name="T2">Conant died in 1679 in what would be Beverly, Massachusetts. <text:s/>It is believed he is buried at the Old Burying ground in Salem but his grave is unmarked. <text:s/></text:span></text:p>
      <text:p text:style-name="P2" loext:marker-style-name="T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meta:editing-cycles>94</meta:editing-cycles>
    <meta:print-date>2025-12-21T19:10:00</meta:print-date>
    <meta:creation-date>2025-07-20T19:56:00</meta:creation-date>
    <dc:date>2026-05-14T19:32:19.395788679</dc:date>
    <meta:editing-duration>P1DT18H32M45S</meta:editing-duration>
    <meta:generator>LibreOffice/24.2.7.2$Linux_X86_64 LibreOffice_project/420$Build-2</meta:generator>
    <meta:document-statistic meta:table-count="0" meta:image-count="0" meta:object-count="0" meta:page-count="1" meta:paragraph-count="6" meta:word-count="294" meta:character-count="1701" meta:non-whitespace-character-count="1391"/>
    <meta:user-defined meta:name="AppVersion">15.0000</meta:user-defined>
    <meta:template xlink:type="simple" xlink:actuate="onRequest" xlink:title="Normal" xlink:href=""/>
  </office:meta>
</office:document-meta>
</file>