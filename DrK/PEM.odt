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List_20_Paragraph">
      <style:text-properties style:font-name="Times New Roman" fo:font-size="12pt" officeooo:paragraph-rsid="0009e1ba" style:font-size-asian="12pt" style:font-name-complex="Times New Roman1" style:font-size-complex="12pt"/>
    </style:style>
    <style:style style:name="P3" style:family="paragraph" style:parent-style-name="List_20_Paragraph">
      <style:text-properties officeooo:paragraph-rsid="0009e1b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1"><text:span text:style-name="T1">Peabody Essex Museum</text:span><text:bookmark text:name="_GoBack"/><text:span text:style-name="T1"><text:line-break/>161 Essex Street<text:line-break/></text:span><text:span text:style-name="T1"/></text:p>
      <text:p text:style-name="List_20_Paragraph" loext:marker-style-name="T1"><text:span text:style-name="T1">The Peabody Essex Museum is the result of several mergers of organization over the years. <text:s/>In 1799, the East India Marine Society was formed and whose members were those who had navigated the seas near the Cape of Good Hope either as a Master or Commander aboard ships belonging to Salem. <text:s/>The organization had several goals including assisting widows and orphans of deceased members, collects facts to improve navigation, to and to collect curiosities. <text:s/>The first gift was from Captain Jonathan Carnes who brought back objects from his voyage to Sumatra. <text:s/>In 1825, the society moved into its own building, the East India Marine Hall.</text:span><text:span text:style-name="T1"/></text:p>
      <text:p text:style-name="P1" loext:marker-style-name="T1"/>
      <text:p text:style-name="List_20_Paragraph" loext:marker-style-name="T1"><text:span text:style-name="T1">The Essex Institute was the union of the Essex Historical Society and the Essex County Natural History Society organized in 1848. <text:s/>The scientific collection was housed at the East India Marine Hall and the library at Plummer Hall. <text:s/></text:span><text:span text:style-name="T1"/></text:p>
      <text:p text:style-name="P1" loext:marker-style-name="T1"/>
      <text:p text:style-name="List_20_Paragraph" loext:marker-style-name="T1"><text:span text:style-name="T1">The East India Marine Society became known as the Peabody Academy of Science (after George Peabody), and focused on collecting art pieces from around the world.</text:span><text:span text:style-name="T1"/></text:p>
      <text:p text:style-name="P1" loext:marker-style-name="T1"/>
      <text:p text:style-name="List_20_Paragraph" loext:marker-style-name="T1"><text:span text:style-name="T1">The two merged in July, 1992, and became the Peabody Essex Museum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dc:creator>Kathleen</dc:creator>
    <meta:editing-cycles>91</meta:editing-cycles>
    <meta:print-date>2025-12-21T19:10:00</meta:print-date>
    <meta:creation-date>2025-07-20T19:56:00</meta:creation-date>
    <dc:date>2026-05-14T16:57:00</dc:date>
    <meta:editing-duration>P1DT18H15M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187" meta:character-count="1132" meta:non-whitespace-character-count="940"/>
    <meta:user-defined meta:name="AppVersion">15.0000</meta:user-defined>
    <meta:template xlink:type="simple" xlink:actuate="onRequest" xlink:title="Normal" xlink:href=""/>
  </office:meta>
</office:document-meta>
</file>