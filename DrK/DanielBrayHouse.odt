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List_20_Paragraph">
      <style:text-properties officeooo:paragraph-rsid="0014a94b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1"><text:span text:style-name="T1">Daniel Bray House<text:line-break/>1 Brown Street</text:span><text:span text:style-name="T1"/></text:p>
      <text:p text:style-name="P1" loext:marker-style-name="T1"/>
      <text:p text:style-name="P1" loext:marker-style-name="T1"/>
      <text:p text:style-name="List_20_Paragraph" loext:marker-style-name="T2"><text:span text:style-name="T2">The Daniel Bray house is dwarfed by the surrounding houses, but there is good reason for it. <text:s/>At that point in Salem’s history, the area was not considered as prestigious and many working class families lived in similar homes around the area. <text:s/>The Bray family owned the land and Daniel Bray built a house on it in 1766, later purchasing the lot from his parents. <text:s/>A shipmaster, he served on many of John Derby’s ships and later managed Derby Wharf after leaving the sea. <text:s/>He died in 1798, but the Bray family had possession until 1856. <text:s/></text:span><text:bookmark text:name="_GoBack"/><text:span text:style-name="T2"/></text:p>
      <text:p text:style-name="P2" loext:marker-style-name="T2"><text:span text:style-name="T2">The house found later incarnations as a grocery store, variety store, studio and offices. </text:span></text:p>
      <text:p text:style-name="P2" loext:marker-style-name="T2"><text:span text:style-name="T2"><text:s/>The Essex Institute (now Peabody Essex Museum) purchased the house and land in 1983, and after extensive research, renovated the house back into its original Georgian structure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4</meta:editing-cycles>
    <meta:print-date>2025-12-21T19:10:00</meta:print-date>
    <meta:creation-date>2025-07-20T19:56:00</meta:creation-date>
    <dc:date>2026-05-12T19:49:48.684556563</dc:date>
    <meta:editing-duration>P1DT17H57M37S</meta:editing-duration>
    <meta:generator>LibreOffice/24.2.7.2$Linux_X86_64 LibreOffice_project/420$Build-2</meta:generator>
    <meta:document-statistic meta:table-count="0" meta:image-count="0" meta:object-count="0" meta:page-count="1" meta:paragraph-count="4" meta:word-count="143" meta:character-count="836" meta:non-whitespace-character-count="689"/>
    <meta:user-defined meta:name="AppVersion">15.0000</meta:user-defined>
    <meta:template xlink:type="simple" xlink:actuate="onRequest" xlink:title="Normal" xlink:href=""/>
  </office:meta>
</office:document-meta>
</file>