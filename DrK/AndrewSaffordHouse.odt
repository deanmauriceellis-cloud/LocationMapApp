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List_20_Paragraph" loext:marker-style-name="T1"><text:span text:style-name="T1">Andrew-Safford House<text:line-break/>13 Washington Square<text:line-break/></text:span><text:span text:style-name="T1"/></text:p>
      <text:p text:style-name="List_20_Paragraph" loext:marker-style-name="T2"><text:span text:style-name="T2">John Andrew was born in 1774 and a member of the firm, Archer and Andrew who engaged in trade. <text:s/>When the business failed, he went to Russia as a commission merchant in St. Petersburg where he was very successful in trading goods between the two countries. <text:s/>On his return to Salem, he continued to engage in shipping up until his death in 1829.</text:span><text:span text:style-name="T2"/></text:p>
      <text:p text:style-name="P1" loext:marker-style-name="T2"/>
      <text:p text:style-name="List_20_Paragraph" loext:marker-style-name="T2"><text:span text:style-name="T2">Work on the house began in 1818 and continued for the next eighteen months. <text:s/>He purchased two lots at the time; one from Jonathan Hodges and the other from John Gardner. <text:s/>He built the house during the time that many changes were made around The Common and many other grand houses were being constructed. <text:s/>The house displays the popular Neo-Classical architecture that appears in many Salem houses; evenly spaced windows and repetition of the fan motif above the front door and arch of the window. <text:s/></text:span><text:span text:style-name="T2"/></text:p>
      <text:p text:style-name="P1" loext:marker-style-name="T2"/>
      <text:p text:style-name="List_20_Paragraph" loext:marker-style-name="T2"><text:span text:style-name="T2">Leaving the house to son after his death, the house passed from one owner to the other until 1871 when it was purchased by James Safford. <text:s/>His son, William Osborn Safford took possession after the death of his father. <text:s/>As a successful business man with an investment office in Boston, he served the public in many capacities including Commission of Health, City Council, Chairman of the Welfare Board, and was a Trustee of the Society for the Prevention of Cruelty to Children. <text:s/>He was a great supporter of the Salem Athenaeum and the Essex Institute. <text:s/></text:span><text:span text:style-name="T2"/></text:p>
      <text:p text:style-name="P1" loext:marker-style-name="T2"/>
      <text:p text:style-name="List_20_Paragraph" loext:marker-style-name="T2"><text:span text:style-name="T2">The Essex Institute purchased the home with donations from prominent</text:span><text:bookmark text:name="_GoBack"/><text:span text:style-name="T2"> Salem residents on August 15, 1947, for $14,216. <text:s/></text:span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6874in"/>
        </style:list-level-properties>
      </text:list-level-style-number>
      <text:list-level-style-number text:level="3" text:style-name="ListLabel_20_3" loext:num-list-format="%3%" style:num-format="1" text:start-value="2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" style:num-format="1" text:start-value="2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374in"/>
        </style:list-level-properties>
      </text:list-level-style-number>
      <text:list-level-style-number text:level="3" text:style-name="ListLabel_20_57" loext:num-list-format="%3%" style:num-format="1" text:start-value="2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thleen</meta:initial-creator>
    <dc:creator>Kathleen</dc:creator>
    <meta:editing-cycles>94</meta:editing-cycles>
    <meta:print-date>2025-12-21T19:10:00</meta:print-date>
    <meta:creation-date>2025-07-20T19:56:00</meta:creation-date>
    <dc:date>2026-05-14T13:13:00</dc:date>
    <meta:editing-duration>P1DT17H46M</meta:editing-duration>
    <meta:generator>LibreOffice/24.2.7.2$Linux_X86_64 LibreOffice_project/420$Build-2</meta:generator>
    <meta:document-statistic meta:table-count="0" meta:image-count="0" meta:object-count="0" meta:page-count="1" meta:paragraph-count="5" meta:word-count="266" meta:character-count="1555" meta:non-whitespace-character-count="1279"/>
    <meta:user-defined meta:name="AppVersion">15.0000</meta:user-defined>
    <meta:template xlink:type="simple" xlink:actuate="onRequest" xlink:title="Normal" xlink:href=""/>
  </office:meta>
</office:document-meta>
</file>