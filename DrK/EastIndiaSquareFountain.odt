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/>
      <text:p text:style-name="List_20_Paragraph" loext:marker-style-name="T1"><text:span text:style-name="T1">East India Square Fountain<text:line-break/>Essex Pedestrian Mall <text:line-break/><text:line-break/>Known as Salem’s Gateway to the Far East, the fountain was completed in 1976 and designed by John Collins. <text:s/>Collins studied at Pennsylvania State University and Harvard School of Design. <text:s/>He was a landscape architect with a partner in the design firm of Collins DuTot and Associates. <text:s/></text:span><text:span text:style-name="T1"/></text:p>
      <text:p text:style-name="P1" loext:marker-style-name="T1"/>
      <text:p text:style-name="List_20_Paragraph" loext:marker-style-name="T1"><text:span text:style-name="T1">This fountain showcases his work as he had a background in landscape architecture and was interested in fusing natural history with cultural importance of a place. <text:s/>Salem’s fountain shows the changing topography of the shoreline. <text:s/>The bottom layer represents the current shoreline of Salem and the top layer that of the original shoreline of the coast. <text:s/></text:span><text:span text:style-name="T1"/></text:p>
      <text:p text:style-name="P1" loext:marker-style-name="T1"/>
      <text:p text:style-name="List_20_Paragraph" loext:marker-style-name="T1"><text:span text:style-name="T1">The topography of Salem has changed dramatically since the founding, with the wharves and docks of the past filled in and new houses and businesses standing on the ground. <text:s/></text:span><text:bookmark text:name="_GoBack"/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874in"/>
        </style:list-level-properties>
      </text:list-level-style-number>
      <text:list-level-style-number text:level="3" text:style-name="ListLabel_20_3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374in"/>
        </style:list-level-properties>
      </text:list-level-style-number>
      <text:list-level-style-number text:level="3" text:style-name="ListLabel_20_57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thleen</meta:initial-creator>
    <dc:creator>Kathleen</dc:creator>
    <meta:editing-cycles>90</meta:editing-cycles>
    <meta:print-date>2025-12-21T19:10:00</meta:print-date>
    <meta:creation-date>2025-07-20T19:56:00</meta:creation-date>
    <dc:date>2026-05-14T15:45:00</dc:date>
    <meta:editing-duration>P1DT17H44M</meta:editing-duration>
    <meta:generator>LibreOffice/24.2.7.2$Linux_X86_64 LibreOffice_project/420$Build-2</meta:generator>
    <meta:document-statistic meta:table-count="0" meta:image-count="0" meta:object-count="0" meta:page-count="1" meta:paragraph-count="3" meta:word-count="139" meta:character-count="863" meta:non-whitespace-character-count="715"/>
    <meta:user-defined meta:name="AppVersion">15.0000</meta:user-defined>
    <meta:template xlink:type="simple" xlink:actuate="onRequest" xlink:title="Normal" xlink:href=""/>
  </office:meta>
</office:document-meta>
</file>