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text-properties officeooo:paragraph-rsid="000efd1f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 loext:marker-style-name="T2"><text:span text:style-name="T1">Quaker Meeting House<text:line-break/>9 Brown Street</text:span><text:span text:style-name="T1"/></text:p>
        </text:list-item>
      </text:list>
      <text:p text:style-name="Standard" loext:marker-style-name="T2"><text:span text:style-name="T3"><text:s/><text:tab/></text:span><text:span text:style-name="T1"/></text:p>
      <text:p text:style-name="P2" loext:marker-style-name="T2"><text:span text:style-name="T2">The first Quakers, also known as the Society of Friends, arrived in New England in 1656. <text:s/>The two women were immediately seized and deported. <text:s/>Laws were passed to prevent further passage of the religious sect aboard ships, but the Quakers were intent on coming. <text:s/>They faced intense persecution by the Congregationalists, the group we now refer to as Puritans, and were often fined, whipped, imprisoned, and even executed for their beliefs. <text:s/></text:span></text:p>
      <text:p text:style-name="P2" loext:marker-style-name="T2"><text:span text:style-name="T2">A notable supporter of the Quakers in Salem was Thomas Maule who arrived from England in 1669. <text:s text:c="2"/>He was to become a merchant who owned various plots of land. <text:s/>On September 14, 1688, he erected a small building for the use of the Quakers who originally had their services in their homes. <text:s/>The original location of the Quaker meeting house is present day 377 Essex Street. </text:span></text:p>
      <text:p text:style-name="P2" loext:marker-style-name="T2"><text:span text:style-name="T2"/></text:p>
      <text:p text:style-name="P2" loext:marker-style-name="T2"><text:span text:style-name="T2"><text:s/>Over the years, the meeting house was enlarged and later became part of a house and occupied by various tenants. <text:s/>By 1756, the meeting house was located at Gallows Hill and was subsequently used in various capacities. <text:s/>It was moved to the present site in 1860 and reconstructed </text:span><text:bookmark text:name="_GoBack"/><text:span text:style-name="T2">using some of the original timber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3" text:style-name="ListLabel_20_3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374in"/>
        </style:list-level-properties>
      </text:list-level-style-number>
      <text:list-level-style-number text:level="3" text:style-name="ListLabel_20_57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thleen</meta:initial-creator>
    <meta:editing-cycles>95</meta:editing-cycles>
    <meta:print-date>2025-12-21T19:10:00</meta:print-date>
    <meta:creation-date>2025-07-20T19:56:00</meta:creation-date>
    <dc:date>2026-05-14T19:16:42.611620405</dc:date>
    <meta:editing-duration>P4DT19H48M1S</meta:editing-duration>
    <meta:generator>LibreOffice/24.2.7.2$Linux_X86_64 LibreOffice_project/420$Build-2</meta:generator>
    <meta:document-statistic meta:table-count="0" meta:image-count="0" meta:object-count="0" meta:page-count="1" meta:paragraph-count="5" meta:word-count="198" meta:character-count="1165" meta:non-whitespace-character-count="956"/>
    <meta:user-defined meta:name="AppVersion">15.0000</meta:user-defined>
    <meta:template xlink:type="simple" xlink:actuate="onRequest" xlink:title="Normal" xlink:href=""/>
  </office:meta>
</office:document-meta>
</file>