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text-properties officeooo:paragraph-rsid="000ad2be"/>
    </style:style>
    <style:style style:name="P3" style:family="paragraph" style:parent-style-name="Standard">
      <style:text-properties style:font-name="Times New Roman" fo:font-size="12pt" style:font-size-asian="12pt" style:font-name-complex="Times New Roman1" style:font-size-complex="12pt"/>
    </style:style>
    <style:style style:name="T1" style:family="text">
      <style:text-properties style:font-name="Times New Roman" fo:font-size="12pt" fo:font-weight="bold" style:font-size-asian="12pt" style:font-weight-asian="bold" style:font-name-complex="Times New Roman1" style:font-size-complex="12pt"/>
    </style:style>
    <style:style style:name="T2" style:family="text">
      <style:text-properties style:font-name="Times New Roman" fo:font-size="12pt" style:font-size-asian="12pt" style:font-name-complex="Times New Roman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1">
        <text:list-item>
          <text:p text:style-name="P1" loext:marker-style-name="T2"><text:span text:style-name="T1">Lye-Tapley Shoe Shop <text:line-break/>9 Brown Street</text:span><text:span text:style-name="T1"/></text:p>
        </text:list-item>
      </text:list>
      <text:p text:style-name="List_20_Paragraph"/>
      <text:p text:style-name="P2" loext:marker-style-name="T2"><text:span text:style-name="T2">Shoemaking was one of the occupations for meaningful employment in the colonies. <text:s/>In Salem, two shoemakers settled in 1629 and Philip Kertland settled in Lynn in 1635. These men were granted certain rights as it was considered a valuable trade with Kertland receiving a grant of 10 acres in Lynn and the two Salem shoemakers given room and board at the expense of the colony. <text:s/>Shoemakers did not just make shoes; there were not enough people to earn a living. <text:s/>Instead, they could become itinerant shoemakers going from settlement to settlement helping to pass along news through the colony and mend shoes and other items. <text:s/>They had the tools to sharpen knives and axes, fix furniture, cut hair, and even if occasion was warranted, pull teeth using their pincers. <text:s/></text:span></text:p>
      <text:p text:style-name="P2" loext:marker-style-name="T2"><text:span text:style-name="T2"/></text:p>
      <text:p text:style-name="P2" loext:marker-style-name="T2"><text:span text:style-name="T2">The Lye-Tapley Shoe Shop is a typical shoe shop of New England consisting of a wooden building and called a “ten footer.” <text:s/>It contains tools of the trade for a shoemaker such as various knives, scrapers, awl, bristles, beeswax, sponge, bottle for blacking, grease, gum and acid, tacks, chalk, </text:span><text:bookmark text:name="_GoBack"/><text:span text:style-name="T2">and a lap stone. <text:s/>The Lye-Tapley Shoe Shop was built in 1783 and originally preserved by the Lynn Historical Society before given over to the Essex Institute (now the Peabody Essex Museum) in 19ll and moved to the present spot. <text:s/></text:span><text:span text:style-name="T2"/></text:p>
      <text:p text:style-name="P3" loext:marker-style-name="T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111in" style:contextual-spacing="tru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0.6874in"/>
        </style:list-level-properties>
      </text:list-level-style-number>
      <text:list-level-style-number text:level="3" text:style-name="ListLabel_20_3" loext:num-list-format="%3%" style:num-format="1" text:start-value="2">
        <style:list-level-properties text:list-level-position-and-space-mode="label-alignment">
          <style:list-level-label-alignment text:label-followed-by="listtab" fo:text-indent="-0.25in" fo:margin-left="1.6252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format="1" text:start-value="2">
        <style:list-level-properties text:list-level-position-and-space-mode="label-alignment">
          <style:list-level-label-alignment text:label-followed-by="listtab" fo:text-indent="-0.25in" fo:margin-left="1.6252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0.9374in"/>
        </style:list-level-properties>
      </text:list-level-style-number>
      <text:list-level-style-number text:level="3" text:style-name="ListLabel_20_57" loext:num-list-format="%3%" style:num-format="1" text:start-value="2">
        <style:list-level-properties text:list-level-position-and-space-mode="label-alignment">
          <style:list-level-label-alignment text:label-followed-by="listtab" fo:text-indent="-0.25in" fo:margin-left="1.6252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athleen</meta:initial-creator>
    <meta:editing-cycles>92</meta:editing-cycles>
    <meta:print-date>2025-12-21T19:10:00</meta:print-date>
    <meta:creation-date>2025-07-20T19:56:00</meta:creation-date>
    <dc:date>2026-05-02T17:14:48.981395004</dc:date>
    <meta:editing-duration>P1DT17H51M41S</meta:editing-duration>
    <meta:generator>LibreOffice/24.2.7.2$Linux_X86_64 LibreOffice_project/420$Build-2</meta:generator>
    <meta:document-statistic meta:table-count="0" meta:image-count="0" meta:object-count="0" meta:page-count="1" meta:paragraph-count="3" meta:word-count="225" meta:character-count="1325" meta:non-whitespace-character-count="1093"/>
    <meta:user-defined meta:name="AppVersion">15.0000</meta:user-defined>
    <meta:template xlink:type="simple" xlink:actuate="onRequest" xlink:title="Normal" xlink:href=""/>
  </office:meta>
</office:document-meta>
</file>