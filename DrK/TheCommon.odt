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style:contextual-spacing="true" fo:line-height="100%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officeooo:paragraph-rsid="000403fc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403fc" style:font-size-asian="12pt" style:font-name-complex="Times New Roman1" style:font-size-complex="12pt"/>
    </style:style>
    <style:style style:name="T5" style:family="text">
      <style:text-properties style:text-position="super 58%"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1" loext:marker-style-name="T3"><text:span text:style-name="T2">The Common<text:line-break/></text:span><text:span text:style-name="T2"/></text:p>
      <text:p text:style-name="Standard"/>
      <text:p text:style-name="P3" loext:marker-style-name="T3"><text:span text:style-name="T3">In the 17</text:span><text:span text:style-name="T5">th</text:span><text:span text:style-name="T3"> century, Salem Common was incredibly swampy and dotted with several ponds. <text:s/>Initially used to graze livestock, and used to dump sewage from the tanners, it was also used to train the local militia. <text:s/>It was also the location of a gun house and almshouses which were moved when the inhabitants decided to make improvements to the nine acres in the late eighteenth century. <text:s/>Led by prominent citizens, the swampy area was filled, trees were planted, walkways laid out, and a fence constructed. <text:s/></text:span></text:p>
      <text:p text:style-name="P3" loext:marker-style-name="T3"><text:span text:style-name="T3">In 1789, George Washington visited Salem and an arch at the northern end of the gate commemorates the event. <text:s/>As Salem grew in wealth, mansions were built replacing the former industrial shops and renamed Washington Square making it a desirable area to live. <text:s/></text:span></text:p>
      <text:p text:style-name="P3" loext:marker-style-name="T3"><text:span text:style-name="T3">There is </text:span><text:span text:style-name="T4">the</text:span><text:span text:style-name="T3"> First Muster monument to mark the spot of America’s first militia </text:span><text:span text:style-name="T4">located at the Commons</text:span><text:span text:style-name="T3">. <text:s/>Today, the Common hosts many events to celebrate Halloween and residents and visitors enjoy the open space. <text:s/>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8</meta:editing-cycles>
    <meta:print-date>2025-12-21T19:10:00</meta:print-date>
    <meta:creation-date>2025-07-20T19:56:00</meta:creation-date>
    <dc:date>2026-05-14T19:39:09.947882146</dc:date>
    <meta:editing-duration>P1DT17H55M43S</meta:editing-duration>
    <meta:generator>LibreOffice/24.2.7.2$Linux_X86_64 LibreOffice_project/420$Build-2</meta:generator>
    <meta:document-statistic meta:table-count="0" meta:image-count="0" meta:object-count="0" meta:page-count="1" meta:paragraph-count="4" meta:word-count="165" meta:character-count="988" meta:non-whitespace-character-count="815"/>
    <meta:user-defined meta:name="AppVersion">15.0000</meta:user-defined>
    <meta:template xlink:type="simple" xlink:actuate="onRequest" xlink:title="Normal" xlink:href=""/>
  </office:meta>
</office:document-meta>
</file>