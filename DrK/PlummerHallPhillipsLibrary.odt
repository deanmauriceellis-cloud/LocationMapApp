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left="0.5in" fo:margin-top="0in" fo:margin-bottom="0in" style:contextual-spacing="false" fo:line-height="100%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<text:line-break/></text:span><text:span text:style-name="T1"/></text:p>
      <text:p text:style-name="List_20_Paragraph" loext:marker-style-name="T1"><text:span text:style-name="T2">Plummer Hall/John Tucker Daland House/once housed Phillips Library<text:line-break/>132 Essex Street<text:line-break/></text:span><text:span text:style-name="T2"/></text:p>
      <text:p text:style-name="List_20_Paragraph" loext:marker-style-name="T1"><text:span text:style-name="T1">At first glance this building seems rather imposing, but it is two buildings combined. <text:s/>When John Tucker Daland first purchased the land in 1834, there was already a house in place. <text:s/>After sixteen years, Daland moved the house by oxen to another part of town. <text:s/>A successful merchant, he hired a Boston architect to design an Italianate-style mansion. <text:s/>After the death of Daland in 1858, his widow lived there until her death where it passed </text:span><text:bookmark text:name="_GoBack"/><text:span text:style-name="T1">through the family until acquired by the Essex Institute in August of 1885 for $5,600. <text:s/></text:span><text:span text:style-name="T1"/></text:p>
      <text:p text:style-name="P1" loext:marker-style-name="T1"/>
      <text:p text:style-name="List_20_Paragraph" loext:marker-style-name="T1"><text:span text:style-name="T1">Plummer Hall is named after Caroline Plummer who left a bequest in order to build the Italianate-style building to house the enormous collection of the Salem Athenaeum. <text:s/>The building was open in 1857. <text:s/>The Essex Institute was sharing space with the Athenaeum leasing the lower floor for its museum, and a section of the upper floor for their library. <text:s/>Overcrowding caused the Essex Institute to look for a new home and a meeting was held where it was decided to seek the purchase of the Daland House next door as a solution if the price was agreeable. <text:s/>Renovations were undertaken in the following years to house the collection of curiosities, pamphlets, books, and artwork. <text:s/>The finished building was opened on June 20, 1887.</text:span><text:span text:style-name="T1"/></text:p>
      <text:p text:style-name="P1" loext:marker-style-name="T1"/>
      <text:p text:style-name="List_20_Paragraph" loext:marker-style-name="T1"><text:span text:style-name="T1">Acquisition of Plummer Hall and the merging of the two buildings occurred in 1906 when the Athenaeum vacated in order to move to a newly constructed building further down on Essex Street. <text:s/>Under the architect, William Rantoul, the two buildings were connected in the Second Renaissance Revival style.</text:span><text:span text:style-name="T1"/></text:p>
      <text:p text:style-name="P1" loext:marker-style-name="T1"/>
      <text:p text:style-name="P1" loext:marker-style-name="T1"/>
      <text:p text:style-name="P1" loext:marker-style-name="T1"/>
      <text:p text:style-name="P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text:style-name="ListLabel_20_3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text:style-name="ListLabel_20_57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hleen</meta:initial-creator>
    <dc:creator>Kathleen</dc:creator>
    <meta:editing-cycles>92</meta:editing-cycles>
    <meta:print-date>2025-12-21T19:10:00</meta:print-date>
    <meta:creation-date>2025-07-20T19:56:00</meta:creation-date>
    <dc:date>2026-05-12T21:17:00</dc:date>
    <meta:editing-duration>P1DT18H58M</meta:editing-duration>
    <meta:generator>LibreOffice/24.2.7.2$Linux_X86_64 LibreOffice_project/420$Build-2</meta:generator>
    <meta:document-statistic meta:table-count="0" meta:image-count="0" meta:object-count="0" meta:page-count="1" meta:paragraph-count="5" meta:word-count="272" meta:character-count="1640" meta:non-whitespace-character-count="1358"/>
    <meta:user-defined meta:name="AppVersion">15.0000</meta:user-defined>
    <meta:template xlink:type="simple" xlink:actuate="onRequest" xlink:title="Normal" xlink:href=""/>
  </office:meta>
</office:document-meta>
</file>