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List_20_Paragraph" loext:marker-style-name="T2"><text:span text:style-name="T2">Derby-Beebee Summer House<text:line-break/>9 Brown Street</text:span><text:span text:style-name="T2"/></text:p>
      <text:p text:style-name="Standard" loext:marker-style-name="T1"><text:span text:style-name="T1">Built for a member of the Derby family, it was completed in 1796 and designed by the famous woodcarver and architect, Samuel McIntire. <text:s/>Summer houses offered a quiet retreat during the hotter months and were often located in the most scenic spot to take in the best possible view. <text:s/>They were often used to entertain guests for tea or light lunches, or simply </text:span><text:bookmark text:name="_GoBack"/><text:span text:style-name="T1">to relax in private. <text:s/>Inspired by English architecture, they were designed to showcase the owner’s wealth. <text:s/>This was once on the farm of Lucius BeeBee in Wakefield but moved to the Peabody Essex grounds. <text:s/>It is only one of two surviving summerhouses designed by McIntire and display characteristic Neo-Classical designs.</text:span><text:span text:style-name="T1"/></text:p>
      <text:p text:style-name="Standard" loext:marker-style-name="T1"><text:span text:style-name="T1">McIntire’s other summerhouse is presently located at the Glen Magna Farms in Danvers, Massachusetts, and under the care of the Danvers Historical Society. <text:s/>Known as the McIntire Tea House, it was built for Elias Hasket Derby between 1793 and 1794, and originally located on Derby’s farm in modern day Peabody. <text:s/></text:span><text:span text:style-name="T1"/></text:p>
      <text:p text:style-name="P2" loext:marker-style-name="T1"/>
      <text:p text:style-name="P2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6874in"/>
        </style:list-level-properties>
      </text:list-level-style-number>
      <text:list-level-style-number text:level="3" text:style-name="ListLabel_20_3" loext:num-list-format="%3%" style:num-format="1" text:start-value="2">
        <style:list-level-properties text:list-level-position-and-space-mode="label-alignment">
          <style:list-level-label-alignment text:label-followed-by="listtab" fo:text-indent="-0.25in" fo:margin-left="1.6252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" style:num-format="1" text:start-value="2">
        <style:list-level-properties text:list-level-position-and-space-mode="label-alignment">
          <style:list-level-label-alignment text:label-followed-by="listtab" fo:text-indent="-0.25in" fo:margin-left="1.6252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374in"/>
        </style:list-level-properties>
      </text:list-level-style-number>
      <text:list-level-style-number text:level="3" text:style-name="ListLabel_20_57" loext:num-list-format="%3%" style:num-format="1" text:start-value="2">
        <style:list-level-properties text:list-level-position-and-space-mode="label-alignment">
          <style:list-level-label-alignment text:label-followed-by="listtab" fo:text-indent="-0.25in" fo:margin-left="1.6252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athleen</meta:initial-creator>
    <dc:creator>Kathleen</dc:creator>
    <meta:editing-cycles>97</meta:editing-cycles>
    <meta:print-date>2025-12-21T19:10:00</meta:print-date>
    <meta:creation-date>2025-07-20T19:56:00</meta:creation-date>
    <dc:date>2026-05-12T21:21:00</dc:date>
    <meta:editing-duration>P1DT17H50M</meta:editing-duration>
    <meta:generator>LibreOffice/24.2.7.2$Linux_X86_64 LibreOffice_project/420$Build-2</meta:generator>
    <meta:document-statistic meta:table-count="0" meta:image-count="0" meta:object-count="0" meta:page-count="1" meta:paragraph-count="3" meta:word-count="169" meta:character-count="1030" meta:non-whitespace-character-count="856"/>
    <meta:user-defined meta:name="AppVersion">15.0000</meta:user-defined>
    <meta:template xlink:type="simple" xlink:actuate="onRequest" xlink:title="Normal" xlink:href=""/>
  </office:meta>
</office:document-meta>
</file>